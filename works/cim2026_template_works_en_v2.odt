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OperaInfos" style:family="table">
      <style:table-properties style:width="17.401cm" table:align="left" style:writing-mode="lr-tb"/>
    </style:style>
    <style:style style:name="OperaInfos.A" style:family="table-column">
      <style:table-column-properties style:column-width="2.96cm"/>
    </style:style>
    <style:style style:name="OperaInfos.B" style:family="table-column">
      <style:table-column-properties style:column-width="2.992cm"/>
    </style:style>
    <style:style style:name="OperaInfos.C" style:family="table-column">
      <style:table-column-properties style:column-width="2.993cm"/>
    </style:style>
    <style:style style:name="OperaInfos.D" style:family="table-column">
      <style:table-column-properties style:column-width="2.808cm"/>
    </style:style>
    <style:style style:name="OperaInfos.E" style:family="table-column">
      <style:table-column-properties style:column-width="3.004cm"/>
    </style:style>
    <style:style style:name="OperaInfos.F" style:family="table-column">
      <style:table-column-properties style:column-width="2.644cm"/>
    </style:style>
    <style:style style:name="OperaInfos.1" style:family="table-row">
      <style:table-row-properties style:min-row-height="0.499cm"/>
    </style:style>
    <style:style style:name="OperaInfos.A1" style:family="table-cell">
      <style:table-cell-properties style:vertical-align="middle" fo:padding="0.049cm" fo:border="0.05pt solid #808080" style:writing-mode="page"/>
    </style:style>
    <style:style style:name="OperaInfos.2" style:family="table-row">
      <style:table-row-properties style:min-row-height="0.9cm"/>
    </style:style>
    <style:style style:name="OperaInfos.A2" style:family="table-cell">
      <style:table-cell-properties style:vertical-align="middle" fo:padding="0.049cm" fo:border-left="0.05pt solid #808080" fo:border-right="none" fo:border-top="none" fo:border-bottom="0.05pt solid #808080" style:writing-mode="page"/>
    </style:style>
    <style:style style:name="OperaInfos.B2" style:family="table-cell">
      <style:table-cell-properties style:vertical-align="middle" fo:padding="0.049cm" fo:border-left="0.05pt solid #808080" fo:border-right="0.05pt solid #808080" fo:border-top="none" fo:border-bottom="0.05pt solid #808080" style:writing-mode="page"/>
    </style:style>
    <style:style style:name="OperaInfos.6" style:family="table-row">
      <style:table-row-properties style:min-row-height="1.499cm"/>
    </style:style>
    <style:style style:name="OperaInfos.A7" style:family="table-cell">
      <style:table-cell-properties style:vertical-align="middle" fo:padding-left="0.049cm" fo:padding-right="0cm" fo:padding-top="0.049cm" fo:padding-bottom="0.049cm" fo:border-left="0.05pt solid #808080" fo:border-right="none" fo:border-top="none" fo:border-bottom="0.05pt solid #808080" style:writing-mode="page"/>
    </style:style>
    <style:style style:name="OperaInfos.B7" style:family="table-cell">
      <style:table-cell-properties style:vertical-align="middle" fo:padding-left="0.049cm" fo:padding-right="0cm" fo:padding-top="0.049cm" fo:padding-bottom="0.049cm" fo:border-left="0.05pt solid #808080" fo:border-right="none" fo:border-top="0.05pt solid #808080" fo:border-bottom="0.05pt solid #808080" style:writing-mode="page"/>
    </style:style>
    <style:style style:name="OperaInfos.F7" style:family="table-cell">
      <style:table-cell-properties style:vertical-align="middle" fo:padding-left="0.049cm" fo:padding-right="0cm" fo:padding-top="0.049cm" fo:padding-bottom="0.049cm" fo:border="0.05pt solid #808080" style:writing-mode="page"/>
    </style:style>
    <style:style style:name="OperaInfos.9" style:family="table-row">
      <style:table-row-properties style:min-row-height="2cm"/>
    </style:style>
    <style:style style:name="Tabella1" style:family="table">
      <style:table-properties style:width="17cm" table:align="margins" style:may-break-between-rows="false" style:writing-mode="lr-tb"/>
    </style:style>
    <style:style style:name="Tabella1.A" style:family="table-column">
      <style:table-column-properties style:column-width="17cm" style:rel-column-width="65535*"/>
    </style:style>
    <style:style style:name="Tabella1.1" style:family="table-row">
      <style:table-row-properties style:min-row-height="0.499cm"/>
    </style:style>
    <style:style style:name="Tabella1.A1" style:family="table-cell">
      <style:table-cell-properties style:vertical-align="middle" fo:padding="0.049cm" fo:border="0.05pt solid #808080" style:writing-mode="page"/>
    </style:style>
    <style:style style:name="Tabella1.2" style:family="table-row">
      <style:table-row-properties style:min-row-height="10.901cm"/>
    </style:style>
    <style:style style:name="Tabella1.A2" style:family="table-cell">
      <style:table-cell-properties fo:padding="0.049cm" fo:border-left="0.05pt solid #808080" fo:border-right="0.05pt solid #808080" fo:border-top="none" fo:border-bottom="0.05pt solid #808080" style:writing-mode="page"/>
    </style:style>
    <style:style style:name="ProgramNotes" style:family="table">
      <style:table-properties style:width="17cm" table:align="margins" style:may-break-between-rows="false" style:writing-mode="lr-tb"/>
    </style:style>
    <style:style style:name="ProgramNotes.A" style:family="table-column">
      <style:table-column-properties style:column-width="17cm" style:rel-column-width="65535*"/>
    </style:style>
    <style:style style:name="ProgramNotes.1" style:family="table-row">
      <style:table-row-properties style:min-row-height="0.499cm"/>
    </style:style>
    <style:style style:name="ProgramNotes.A1" style:family="table-cell">
      <style:table-cell-properties style:vertical-align="middle" fo:padding="0.049cm" fo:border="0.05pt solid #808080" style:writing-mode="page"/>
    </style:style>
    <style:style style:name="ProgramNotes.2" style:family="table-row">
      <style:table-row-properties style:min-row-height="6.9cm"/>
    </style:style>
    <style:style style:name="ProgramNotes.A2" style:family="table-cell">
      <style:table-cell-properties fo:padding="0.049cm" fo:border-left="0.05pt solid #808080" fo:border-right="0.05pt solid #808080" fo:border-top="none" fo:border-bottom="0.05pt solid #808080" style:writing-mode="page"/>
    </style:style>
    <style:style style:name="BioAutori" style:family="table">
      <style:table-properties style:width="17cm" table:align="margins" style:may-break-between-rows="false" style:writing-mode="lr-tb"/>
    </style:style>
    <style:style style:name="BioAutori.A" style:family="table-column">
      <style:table-column-properties style:column-width="17cm" style:rel-column-width="65535*"/>
    </style:style>
    <style:style style:name="BioAutori.1" style:family="table-row">
      <style:table-row-properties style:min-row-height="0.499cm"/>
    </style:style>
    <style:style style:name="BioAutori.A1" style:family="table-cell">
      <style:table-cell-properties style:vertical-align="middle" fo:padding="0.049cm" fo:border="0.05pt solid #808080" style:writing-mode="page"/>
    </style:style>
    <style:style style:name="BioAutori.2" style:family="table-row">
      <style:table-row-properties style:min-row-height="3.5cm"/>
    </style:style>
    <style:style style:name="BioAutori.A2" style:family="table-cell">
      <style:table-cell-properties fo:padding="0.049cm" fo:border-left="0.05pt solid #808080" fo:border-right="0.05pt solid #808080" fo:border-top="none" fo:border-bottom="0.05pt solid #808080" style:writing-mode="page"/>
    </style:style>
    <style:style style:name="BioInterpreti" style:family="table">
      <style:table-properties style:width="17cm" table:align="margins" style:may-break-between-rows="false" style:writing-mode="lr-tb"/>
    </style:style>
    <style:style style:name="BioInterpreti.A" style:family="table-column">
      <style:table-column-properties style:column-width="17cm" style:rel-column-width="65535*"/>
    </style:style>
    <style:style style:name="BioInterpreti.1" style:family="table-row">
      <style:table-row-properties style:min-row-height="0.499cm"/>
    </style:style>
    <style:style style:name="BioInterpreti.A1" style:family="table-cell">
      <style:table-cell-properties style:vertical-align="middle" fo:padding="0.049cm" fo:border="0.05pt solid #808080" style:writing-mode="page"/>
    </style:style>
    <style:style style:name="BioInterpreti.2" style:family="table-row">
      <style:table-row-properties style:min-row-height="3.5cm"/>
    </style:style>
    <style:style style:name="BioInterpreti.A2" style:family="table-cell">
      <style:table-cell-properties fo:padding="0.049cm" fo:border-left="0.05pt solid #808080" fo:border-right="0.05pt solid #808080" fo:border-top="none" fo:border-bottom="0.05pt solid #808080" style:writing-mode="page"/>
    </style:style>
    <style:style style:name="TechRider" style:family="table">
      <style:table-properties style:width="17cm" table:align="margins" style:may-break-between-rows="false" style:writing-mode="lr-tb"/>
    </style:style>
    <style:style style:name="TechRider.A" style:family="table-column">
      <style:table-column-properties style:column-width="17cm" style:rel-column-width="65535*"/>
    </style:style>
    <style:style style:name="TechRider.1" style:family="table-row">
      <style:table-row-properties style:min-row-height="0.499cm"/>
    </style:style>
    <style:style style:name="TechRider.A1" style:family="table-cell">
      <style:table-cell-properties style:vertical-align="middle" fo:padding="0.049cm" fo:border="0.05pt solid #808080" style:writing-mode="page"/>
    </style:style>
    <style:style style:name="TechRider.2" style:family="table-row">
      <style:table-row-properties style:min-row-height="6.9cm"/>
    </style:style>
    <style:style style:name="TechRider.A2" style:family="table-cell">
      <style:table-cell-properties fo:padding="0.049cm" fo:border-left="0.05pt solid #808080" fo:border-right="0.05pt solid #808080" fo:border-top="none" fo:border-bottom="0.05pt solid #808080" style:writing-mode="page"/>
    </style:style>
    <style:style style:name="P1" style:family="paragraph" style:parent-style-name="program_20_notes" style:master-page-name="Standard">
      <style:paragraph-properties style:page-number="1"/>
      <style:text-properties fo:font-size="16pt" fo:font-weight="bold" officeooo:paragraph-rsid="0007f7f5" style:font-size-asian="16pt" style:font-weight-asian="bold" style:font-size-complex="16pt" style:font-weight-complex="bold"/>
    </style:style>
    <style:style style:name="P2" style:family="paragraph" style:parent-style-name="program_20_notes">
      <style:text-properties officeooo:paragraph-rsid="0007f7f5"/>
    </style:style>
    <style:style style:name="P3" style:family="paragraph" style:parent-style-name="program_20_notes">
      <style:text-properties fo:font-weight="bold" officeooo:rsid="002be9c8" officeooo:paragraph-rsid="0007f7f5" style:font-weight-asian="bold" style:font-weight-complex="bold"/>
    </style:style>
    <style:style style:name="P4" style:family="paragraph" style:parent-style-name="Table_20_Heading">
      <style:paragraph-properties fo:text-align="left" style:justify-single-word="false"/>
      <style:text-properties style:font-name="Times New Roman" fo:font-size="12pt" officeooo:rsid="002d9518" officeooo:paragraph-rsid="0007f7f5" style:font-name-asian="Times New Roman1" style:font-size-asian="12pt" style:font-name-complex="Times New Roman1" style:font-size-complex="12pt"/>
    </style:style>
    <style:style style:name="P5" style:family="paragraph" style:parent-style-name="program_20_notes">
      <style:paragraph-properties fo:text-align="left" style:justify-single-word="false"/>
      <style:text-properties officeooo:paragraph-rsid="0007f7f5"/>
    </style:style>
    <style:style style:name="P6" style:family="paragraph" style:parent-style-name="Table_20_Contents">
      <style:paragraph-properties fo:text-align="justify" style:justify-single-word="false"/>
      <style:text-properties style:font-name="Times New Roman" fo:font-size="12pt" officeooo:paragraph-rsid="0007f7f5" style:font-name-asian="Times New Roman1" style:font-size-asian="12pt" style:font-name-complex="Times New Roman1" style:font-size-complex="12pt"/>
    </style:style>
    <style:style style:name="P7" style:family="paragraph" style:parent-style-name="program_20_notes">
      <style:text-properties officeooo:rsid="004aa9eb" officeooo:paragraph-rsid="00188474"/>
    </style:style>
    <style:style style:name="P8" style:family="paragraph" style:parent-style-name="program_20_notes">
      <style:paragraph-properties fo:text-align="left" style:justify-single-word="false"/>
      <style:text-properties fo:font-size="12pt" officeooo:rsid="00188474" officeooo:paragraph-rsid="00188474" style:font-size-asian="12pt" style:font-size-complex="12pt"/>
    </style:style>
    <style:style style:name="P9" style:family="paragraph" style:parent-style-name="program_20_notes">
      <style:text-properties officeooo:rsid="00266896" officeooo:paragraph-rsid="00188474"/>
    </style:style>
    <style:style style:name="P10" style:family="paragraph" style:parent-style-name="program_20_notes">
      <style:paragraph-properties fo:text-align="left" style:justify-single-word="false"/>
      <style:text-properties fo:font-size="10pt" officeooo:paragraph-rsid="0007f7f5" style:font-size-asian="10pt" style:font-size-complex="10pt"/>
    </style:style>
    <style:style style:name="P11" style:family="paragraph" style:parent-style-name="program_20_notes">
      <style:paragraph-properties fo:text-align="left" style:justify-single-word="false"/>
      <style:text-properties fo:font-size="12pt" officeooo:rsid="000f7c8c" officeooo:paragraph-rsid="000f7c8c" style:font-size-asian="12pt" style:font-size-complex="12pt"/>
    </style:style>
    <style:style style:name="P12" style:family="paragraph" style:parent-style-name="program_20_notes">
      <style:text-properties officeooo:rsid="002be9c8" officeooo:paragraph-rsid="0007f7f5"/>
    </style:style>
    <style:style style:name="P13" style:family="paragraph" style:parent-style-name="program_20_notes">
      <style:text-properties officeooo:rsid="002be9c8" officeooo:paragraph-rsid="00188474"/>
    </style:style>
    <style:style style:name="P14" style:family="paragraph" style:parent-style-name="Standard">
      <style:text-properties officeooo:rsid="002be9c8" officeooo:paragraph-rsid="0007f7f5"/>
    </style:style>
    <style:style style:name="P15" style:family="paragraph" style:parent-style-name="program_20_notes">
      <style:text-properties fo:font-weight="bold" officeooo:rsid="002f5351" officeooo:paragraph-rsid="00188474" style:font-weight-asian="bold" style:font-weight-complex="bold"/>
    </style:style>
    <style:style style:name="P16" style:family="paragraph" style:parent-style-name="program_20_notes">
      <style:text-properties fo:font-weight="bold" officeooo:paragraph-rsid="0007f7f5" style:font-weight-asian="bold" style:font-weight-complex="bold"/>
    </style:style>
    <style:style style:name="P17" style:family="paragraph" style:parent-style-name="program_20_notes" style:master-page-name="Right_20_Page">
      <style:paragraph-properties style:page-number="auto"/>
      <style:text-properties fo:font-weight="bold" officeooo:paragraph-rsid="0007f7f5" style:font-weight-asian="bold" style:font-weight-complex="bold"/>
    </style:style>
    <style:style style:name="P18" style:family="paragraph" style:parent-style-name="program_20_notes">
      <style:text-properties fo:font-size="10.5pt" officeooo:rsid="003ba395" officeooo:paragraph-rsid="00188474" style:font-size-asian="10.5pt" style:font-size-complex="10.5pt"/>
    </style:style>
    <style:style style:name="P19" style:family="paragraph" style:parent-style-name="program_20_notes">
      <style:text-properties fo:font-size="10.5pt" officeooo:paragraph-rsid="0007f7f5" style:font-size-asian="10.5pt" style:font-size-complex="10.5pt"/>
    </style:style>
    <style:style style:name="P20" style:family="paragraph" style:parent-style-name="program_20_notes">
      <style:text-properties fo:font-size="10.5pt" fo:font-weight="bold" officeooo:paragraph-rsid="001248ed" style:font-size-asian="10.5pt" style:font-weight-asian="bold" style:font-size-complex="10.5pt" style:font-weight-complex="bold"/>
    </style:style>
    <style:style style:name="P21" style:family="paragraph" style:parent-style-name="program_20_notes">
      <style:paragraph-properties fo:line-height="150%"/>
      <style:text-properties fo:font-size="10.5pt" fo:font-weight="normal" officeooo:paragraph-rsid="00188474" style:font-size-asian="10.5pt" style:font-weight-asian="normal" style:font-size-complex="10.5pt" style:font-weight-complex="normal"/>
    </style:style>
    <style:style style:name="P22" style:family="paragraph" style:parent-style-name="program_20_notes" style:list-style-name="L1">
      <style:text-properties fo:font-size="10.5pt" fo:font-weight="normal" officeooo:paragraph-rsid="00188474" style:font-size-asian="10.5pt" style:font-weight-asian="normal" style:font-size-complex="10.5pt" style:font-weight-complex="normal"/>
    </style:style>
    <style:style style:name="P23" style:family="paragraph" style:parent-style-name="program_20_notes">
      <style:text-properties fo:font-size="10.5pt" officeooo:paragraph-rsid="001248ed" style:font-size-asian="10.5pt" style:font-size-complex="10.5pt"/>
    </style:style>
    <style:style style:name="P24" style:family="paragraph" style:parent-style-name="program_20_notes">
      <style:text-properties fo:font-size="10.5pt" fo:font-weight="bold" officeooo:rsid="0027f3ad" officeooo:paragraph-rsid="0007f7f5" style:font-size-asian="10.5pt" style:font-weight-asian="bold" style:font-size-complex="10.5pt" style:font-weight-complex="bold"/>
    </style:style>
    <style:style style:name="P25" style:family="paragraph" style:parent-style-name="program_20_notes">
      <style:text-properties fo:font-size="10.5pt" fo:font-weight="normal" officeooo:rsid="0032888d" officeooo:paragraph-rsid="0007f7f5" style:font-size-asian="10.5pt" style:font-weight-asian="normal" style:font-size-complex="10.5pt" style:font-weight-complex="normal"/>
    </style:style>
    <style:style style:name="P26" style:family="paragraph" style:parent-style-name="program_20_notes">
      <style:text-properties fo:font-size="10.5pt" fo:font-weight="bold" officeooo:paragraph-rsid="0007f7f5" style:font-size-asian="10.5pt" style:font-weight-asian="bold" style:font-size-complex="10.5pt" style:font-weight-complex="bold"/>
    </style:style>
    <style:style style:name="P27" style:family="paragraph" style:parent-style-name="program_20_notes">
      <style:text-properties fo:font-size="10.5pt" fo:font-weight="bold" officeooo:rsid="00188474" officeooo:paragraph-rsid="00188474" style:font-size-asian="10.5pt" style:font-weight-asian="bold" style:font-size-complex="10.5pt" style:font-weight-complex="bold"/>
    </style:style>
    <style:style style:name="P28" style:family="paragraph" style:parent-style-name="program_20_notes">
      <style:text-properties fo:font-size="10.5pt" fo:font-weight="normal" officeooo:rsid="001248ed" officeooo:paragraph-rsid="001248ed" style:font-size-asian="10.5pt" style:font-weight-asian="normal" style:font-size-complex="10.5pt" style:font-weight-complex="normal"/>
    </style:style>
    <style:style style:name="P29" style:family="paragraph" style:parent-style-name="program_20_notes">
      <style:text-properties fo:font-size="10.5pt" fo:font-weight="normal" officeooo:rsid="0032888d" officeooo:paragraph-rsid="001248ed" style:font-size-asian="10.5pt" style:font-weight-asian="normal" style:font-size-complex="10.5pt" style:font-weight-complex="normal"/>
    </style:style>
    <style:style style:name="P30" style:family="paragraph" style:parent-style-name="program_20_notes">
      <style:text-properties fo:font-size="10.5pt" fo:font-weight="normal" officeooo:paragraph-rsid="00188474" style:font-size-asian="10.5pt" style:font-weight-asian="normal" style:font-size-complex="10.5pt" style:font-weight-complex="normal"/>
    </style:style>
    <style:style style:name="P31" style:family="paragraph" style:parent-style-name="program_20_notes">
      <style:text-properties fo:font-size="10.5pt" officeooo:rsid="00188474" officeooo:paragraph-rsid="00188474" style:font-size-asian="10.5pt" style:font-size-complex="10.5pt"/>
    </style:style>
    <style:style style:name="P32" style:family="paragraph" style:parent-style-name="program_20_notes">
      <style:text-properties fo:font-size="10.5pt" fo:font-weight="bold" officeooo:rsid="001248ed" officeooo:paragraph-rsid="001248ed" style:font-size-asian="10.5pt" style:font-weight-asian="bold" style:font-size-complex="10.5pt" style:font-weight-complex="bold"/>
    </style:style>
    <style:style style:name="P33" style:family="paragraph" style:parent-style-name="program_20_notes">
      <style:text-properties fo:font-size="10.5pt" fo:font-weight="bold" officeooo:rsid="0032888d" officeooo:paragraph-rsid="0007f7f5" style:font-size-asian="10.5pt" style:font-weight-asian="bold" style:font-size-complex="10.5pt" style:font-weight-complex="bold"/>
    </style:style>
    <style:style style:name="P34" style:family="paragraph" style:parent-style-name="program_20_notes">
      <style:text-properties fo:font-variant="normal" fo:text-transform="none" fo:color="#000000" loext:opacity="100%" style:text-line-through-style="none" style:text-line-through-type="none" style:text-position="0% 100%" fo:font-size="10.5pt" fo:font-style="normal" style:text-underline-style="none" fo:font-weight="normal" officeooo:paragraph-rsid="0007f7f5" fo:background-color="transparent" style:font-name-asian="Times New Roman1" style:font-size-asian="10.5pt" style:font-style-asian="normal" style:font-weight-asian="normal" style:font-name-complex="Times New Roman1" style:font-size-complex="10.5pt" style:font-style-complex="normal" style:font-weight-complex="normal"/>
    </style:style>
    <style:style style:name="P35" style:family="paragraph" style:parent-style-name="program_20_notes">
      <style:text-properties fo:font-variant="normal" fo:text-transform="none" fo:color="#000000" loext:opacity="100%" style:text-line-through-style="none" style:text-line-through-type="none" style:text-position="0% 100%" fo:font-size="10.5pt" fo:font-style="normal" style:text-underline-style="none" fo:font-weight="bold" officeooo:paragraph-rsid="0007f7f5" fo:background-color="transparent" style:font-name-asian="Times New Roman1" style:font-size-asian="10.5pt" style:font-style-asian="normal" style:font-weight-asian="bold" style:font-name-complex="Times New Roman1" style:font-size-complex="10.5pt" style:font-style-complex="normal" style:font-weight-complex="bold"/>
    </style:style>
    <style:style style:name="P36" style:family="paragraph" style:parent-style-name="program_20_notes">
      <style:text-properties fo:font-variant="normal" fo:text-transform="none" fo:color="#000000" loext:opacity="100%" style:text-line-through-style="none" style:text-line-through-type="none" style:text-position="0% 100%" fo:font-size="10.5pt" fo:font-style="normal" style:text-underline-style="none" fo:font-weight="normal" officeooo:rsid="0032888d" officeooo:paragraph-rsid="0013d445" fo:background-color="transparent" style:font-name-asian="Times New Roman1" style:font-size-asian="10.5pt" style:font-style-asian="normal" style:font-weight-asian="normal" style:font-name-complex="Times New Roman1" style:font-size-complex="10.5pt" style:font-style-complex="normal" style:font-weight-complex="normal"/>
    </style:style>
    <style:style style:name="P37" style:family="paragraph" style:parent-style-name="program_20_notes">
      <style:text-properties fo:font-variant="normal" fo:text-transform="none" fo:color="#000000" loext:opacity="100%" style:text-line-through-style="none" style:text-line-through-type="none" style:text-position="0% 100%" fo:font-size="10.5pt" fo:font-style="normal" style:text-underline-style="none" fo:font-weight="bold" officeooo:rsid="0032888d" officeooo:paragraph-rsid="0018f059" fo:background-color="transparent" style:font-name-asian="Times New Roman1" style:font-size-asian="10.5pt" style:font-style-asian="normal" style:font-weight-asian="bold" style:font-name-complex="Times New Roman1" style:font-size-complex="10.5pt" style:font-style-complex="normal" style:font-weight-complex="bold"/>
    </style:style>
    <style:style style:name="P38" style:family="paragraph" style:parent-style-name="program_20_notes">
      <style:text-properties fo:font-variant="normal" fo:text-transform="none" fo:color="#000000" loext:opacity="100%" style:text-line-through-style="none" style:text-line-through-type="none" fo:font-size="10.5pt" fo:font-style="normal" style:text-underline-style="none" fo:font-weight="normal" officeooo:rsid="0032888d" officeooo:paragraph-rsid="0018f059" fo:background-color="transparent" style:font-name-asian="Times New Roman1" style:font-size-asian="10.5pt" style:font-style-asian="normal" style:font-weight-asian="normal" style:font-name-complex="Times New Roman1" style:font-size-complex="10.5pt" style:font-style-complex="normal" style:font-weight-complex="normal"/>
    </style:style>
    <style:style style:name="P39" style:family="paragraph" style:parent-style-name="program_20_notes">
      <style:text-properties fo:font-variant="normal" fo:text-transform="none" fo:color="#000000" loext:opacity="100%" style:text-line-through-style="none" style:text-line-through-type="none" style:text-position="0% 100%" fo:font-size="10.5pt" fo:font-style="normal" style:text-underline-style="none" fo:font-weight="bold" officeooo:rsid="0032888d" officeooo:paragraph-rsid="0007f7f5" fo:background-color="transparent" style:font-name-asian="Times New Roman1" style:font-size-asian="10.5pt" style:font-style-asian="normal" style:font-weight-asian="bold" style:font-name-complex="Times New Roman1" style:font-size-complex="10.5pt" style:font-style-complex="normal" style:font-weight-complex="bold"/>
    </style:style>
    <style:style style:name="P40" style:family="paragraph" style:parent-style-name="program_20_notes">
      <style:text-properties fo:font-variant="normal" fo:text-transform="none" fo:color="#000000" loext:opacity="100%" style:text-line-through-style="none" style:text-line-through-type="none" fo:font-size="10.5pt" fo:font-style="normal" style:text-underline-style="none" fo:font-weight="normal" officeooo:rsid="0032888d" officeooo:paragraph-rsid="0007f7f5" fo:background-color="transparent" style:font-name-asian="Times New Roman1" style:font-size-asian="10.5pt" style:font-style-asian="normal" style:font-weight-asian="normal" style:font-name-complex="Times New Roman1" style:font-size-complex="10.5pt" style:font-style-complex="normal" style:font-weight-complex="normal"/>
    </style:style>
    <style:style style:name="T1" style:family="text">
      <style:text-properties officeooo:rsid="00188474"/>
    </style:style>
    <style:style style:name="T2" style:family="text">
      <style:text-properties officeooo:rsid="004aa9eb"/>
    </style:style>
    <style:style style:name="T3" style:family="text">
      <style:text-properties fo:font-weight="bold" style:font-weight-asian="bold" style:font-weight-complex="bold"/>
    </style:style>
    <style:style style:name="T4" style:family="text">
      <style:text-properties officeooo:rsid="0032f9ed"/>
    </style:style>
    <style:style style:name="T5" style:family="text">
      <style:text-properties officeooo:rsid="00453616"/>
    </style:style>
    <style:style style:name="T6" style:family="text">
      <style:text-properties fo:font-weight="bold" officeooo:rsid="004aa9eb" style:font-weight-asian="bold" style:font-weight-complex="bold"/>
    </style:style>
    <style:style style:name="T7" style:family="text">
      <style:text-properties officeooo:rsid="002f5351"/>
    </style:style>
    <style:style style:name="T8" style:family="text">
      <style:text-properties officeooo:rsid="002be9c8"/>
    </style:style>
    <style:style style:name="T9" style:family="text">
      <style:text-properties fo:font-weight="normal" officeooo:rsid="002be9c8" style:font-weight-asian="normal" style:font-weight-complex="normal"/>
    </style:style>
    <style:style style:name="T10" style:family="text">
      <style:text-properties fo:font-weight="normal" officeooo:rsid="004aa9eb" style:font-weight-asian="normal"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00c9b36" style:font-style-asian="italic" style:font-weight-asian="normal" style:font-style-complex="italic" style:font-weight-complex="normal"/>
    </style:style>
    <style:style style:name="T13" style:family="text">
      <style:text-properties fo:font-style="normal" officeooo:rsid="00188474" style:font-style-asian="normal" style:font-style-complex="normal"/>
    </style:style>
    <style:style style:name="T14" style:family="text">
      <style:text-properties fo:font-style="normal" officeooo:rsid="00212cbd" style:font-style-asian="normal" style:font-style-complex="normal"/>
    </style:style>
    <style:style style:name="T15" style:family="text">
      <style:text-properties fo:font-style="normal" officeooo:rsid="000ba8dd" style:font-style-asian="normal" style:font-style-complex="normal"/>
    </style:style>
    <style:style style:name="T16" style:family="text">
      <style:text-properties fo:font-style="italic" officeooo:rsid="00212cbd" style:font-style-asian="italic" style:font-style-complex="italic"/>
    </style:style>
    <style:style style:name="T17" style:family="text">
      <style:text-properties officeooo:rsid="0032888d"/>
    </style:style>
    <style:style style:name="T18" style:family="text">
      <style:text-properties fo:font-weight="bold" officeooo:rsid="0027f3ad" style:font-weight-asian="bold" style:font-weight-complex="bold"/>
    </style:style>
    <style:style style:name="T19" style:family="text">
      <style:text-properties officeooo:rsid="001cc545"/>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XXV CIM Colloquio di Informatica Musicale</text:p>
      <text:p text:style-name="P2">L’Aquila | October 13-16, 2026</text:p>
      <text:p text:style-name="P2"/>
      <text:p text:style-name="P2"/>
      <text:p text:style-name="P3">APPLICATION FORM FOR THE SELECTION OF WORKS (music and sound art)</text:p>
      <text:p text:style-name="P2"/>
      <text:p text:style-name="P2"/>
      <table:table table:name="OperaInfos" table:style-name="OperaInfos">
        <table:table-column table:style-name="OperaInfos.A"/>
        <table:table-column table:style-name="OperaInfos.B"/>
        <table:table-column table:style-name="OperaInfos.C"/>
        <table:table-column table:style-name="OperaInfos.D"/>
        <table:table-column table:style-name="OperaInfos.E"/>
        <table:table-column table:style-name="OperaInfos.F"/>
        <table:table-header-rows>
          <table:table-row table:style-name="OperaInfos.1">
            <table:table-cell table:style-name="OperaInfos.A1" table:number-columns-spanned="6" office:value-type="string">
              <text:p text:style-name="P4">Opera</text:p>
            </table:table-cell>
            <table:covered-table-cell/>
            <table:covered-table-cell/>
            <table:covered-table-cell/>
            <table:covered-table-cell/>
            <table:covered-table-cell/>
          </table:table-row>
        </table:table-header-rows>
        <table:table-row table:style-name="OperaInfos.2">
          <table:table-cell table:style-name="OperaInfos.A2" office:value-type="string">
            <text:p text:style-name="P5">Category</text:p>
          </table:table-cell>
          <table:table-cell table:style-name="OperaInfos.B2" table:number-columns-spanned="5" office:value-type="string">
            <text:p text:style-name="P6"/>
          </table:table-cell>
          <table:covered-table-cell/>
          <table:covered-table-cell/>
          <table:covered-table-cell/>
          <table:covered-table-cell/>
        </table:table-row>
        <table:table-row table:style-name="OperaInfos.2">
          <table:table-cell table:style-name="OperaInfos.A2" office:value-type="string">
            <text:p text:style-name="P5">Titl<text:span text:style-name="T1">e</text:span></text:p>
          </table:table-cell>
          <table:table-cell table:style-name="OperaInfos.B2" table:number-columns-spanned="5" office:value-type="string">
            <text:p text:style-name="P6"/>
          </table:table-cell>
          <table:covered-table-cell/>
          <table:covered-table-cell/>
          <table:covered-table-cell/>
          <table:covered-table-cell/>
        </table:table-row>
        <table:table-row table:style-name="OperaInfos.2">
          <table:table-cell table:style-name="OperaInfos.A2" office:value-type="string">
            <text:p text:style-name="P7">Subtitle</text:p>
          </table:table-cell>
          <table:table-cell table:style-name="OperaInfos.B2" table:number-columns-spanned="5" office:value-type="string">
            <text:p text:style-name="P6"/>
          </table:table-cell>
          <table:covered-table-cell/>
          <table:covered-table-cell/>
          <table:covered-table-cell/>
          <table:covered-table-cell/>
        </table:table-row>
        <table:table-row table:style-name="OperaInfos.2">
          <table:table-cell table:style-name="OperaInfos.A2" office:value-type="string">
            <text:p text:style-name="P8">Year</text:p>
          </table:table-cell>
          <table:table-cell table:style-name="OperaInfos.B2" table:number-columns-spanned="5" office:value-type="string">
            <text:p text:style-name="P6"/>
          </table:table-cell>
          <table:covered-table-cell/>
          <table:covered-table-cell/>
          <table:covered-table-cell/>
          <table:covered-table-cell/>
        </table:table-row>
        <table:table-row table:style-name="OperaInfos.6">
          <table:table-cell table:style-name="OperaInfos.A2" office:value-type="string">
            <text:p text:style-name="P9">Aut<text:span text:style-name="T2">hors</text:span></text:p>
          </table:table-cell>
          <table:table-cell table:style-name="OperaInfos.B2" table:number-columns-spanned="5" office:value-type="string">
            <text:p text:style-name="P6"/>
          </table:table-cell>
          <table:covered-table-cell/>
          <table:covered-table-cell/>
          <table:covered-table-cell/>
          <table:covered-table-cell/>
        </table:table-row>
        <table:table-row table:style-name="OperaInfos.2">
          <table:table-cell table:style-name="OperaInfos.A7" office:value-type="string">
            <text:p text:style-name="P10">Expected duration</text:p>
          </table:table-cell>
          <table:table-cell table:style-name="OperaInfos.B7" office:value-type="string">
            <text:p text:style-name="P6"/>
          </table:table-cell>
          <table:table-cell table:style-name="OperaInfos.B7" office:value-type="string">
            <text:p text:style-name="P10">Minimum duration</text:p>
          </table:table-cell>
          <table:table-cell table:style-name="OperaInfos.B7" office:value-type="string">
            <text:p text:style-name="P6"/>
          </table:table-cell>
          <table:table-cell table:style-name="OperaInfos.B7" office:value-type="string">
            <text:p text:style-name="P10">Maximum duration</text:p>
          </table:table-cell>
          <table:table-cell table:style-name="OperaInfos.F7" office:value-type="string">
            <text:p text:style-name="P6"/>
          </table:table-cell>
        </table:table-row>
        <table:table-row table:style-name="OperaInfos.6">
          <table:table-cell table:style-name="OperaInfos.A2" office:value-type="string">
            <text:p text:style-name="P7">Performers</text:p>
          </table:table-cell>
          <table:table-cell table:style-name="OperaInfos.B2" table:number-columns-spanned="5" office:value-type="string">
            <text:p text:style-name="P6"/>
          </table:table-cell>
          <table:covered-table-cell/>
          <table:covered-table-cell/>
          <table:covered-table-cell/>
          <table:covered-table-cell/>
        </table:table-row>
        <table:table-row table:style-name="OperaInfos.9">
          <table:table-cell table:style-name="OperaInfos.A2" office:value-type="string">
            <text:p text:style-name="P11">Repository URL<text:span text:style-name="T1">(s)</text:span></text:p>
          </table:table-cell>
          <table:table-cell table:style-name="OperaInfos.B2" table:number-columns-spanned="5" office:value-type="string">
            <text:p text:style-name="P6"/>
          </table:table-cell>
          <table:covered-table-cell/>
          <table:covered-table-cell/>
          <table:covered-table-cell/>
          <table:covered-table-cell/>
        </table:table-row>
      </table:table>
      <text:p text:style-name="P12"/>
      <table:table table:name="Tabella1" table:style-name="Tabella1">
        <table:table-column table:style-name="Tabella1.A"/>
        <table:table-row table:style-name="Tabella1.1">
          <table:table-cell table:style-name="Tabella1.A1" office:value-type="string">
            <text:p text:style-name="P13"><text:span text:style-name="T3">Work presentation </text:span>(max <text:span text:style-name="T4">2000</text:span> c<text:span text:style-name="T2">haracters</text:span><text:span text:style-name="T5">)</text:span></text:p>
          </table:table-cell>
        </table:table-row>
        <table:table-row table:style-name="Tabella1.2">
          <table:table-cell table:style-name="Tabella1.A2" office:value-type="string">
            <text:p text:style-name="P2"/>
          </table:table-cell>
        </table:table-row>
      </table:table>
      <text:p text:style-name="P14"><text:soft-page-break/></text:p>
      <table:table table:name="ProgramNotes" table:style-name="ProgramNotes">
        <table:table-column table:style-name="ProgramNotes.A"/>
        <table:table-row table:style-name="ProgramNotes.1">
          <table:table-cell table:style-name="ProgramNotes.A1" office:value-type="string">
            <text:p text:style-name="P13"><text:span text:style-name="T6">Program notes</text:span><text:span text:style-name="T3"> </text:span>(max 1000 c<text:span text:style-name="T2">haracters</text:span>)</text:p>
          </table:table-cell>
        </table:table-row>
        <table:table-row table:style-name="ProgramNotes.2">
          <table:table-cell table:style-name="ProgramNotes.A2" office:value-type="string">
            <text:p text:style-name="P2"/>
          </table:table-cell>
        </table:table-row>
      </table:table>
      <text:p text:style-name="P12"/>
      <table:table table:name="BioAutori" table:style-name="BioAutori">
        <table:table-column table:style-name="BioAutori.A"/>
        <table:table-row table:style-name="BioAutori.1">
          <table:table-cell table:style-name="BioAutori.A1" office:value-type="string">
            <text:p text:style-name="P13"><text:span text:style-name="T3">Authors’ biographies </text:span>(max <text:span text:style-name="T7">5</text:span>00 c<text:span text:style-name="T2">haracters</text:span>)</text:p>
          </table:table-cell>
        </table:table-row>
        <table:table-row table:style-name="BioAutori.2">
          <table:table-cell table:style-name="BioAutori.A2" office:value-type="string">
            <text:p text:style-name="P2"/>
          </table:table-cell>
        </table:table-row>
      </table:table>
      <text:p text:style-name="P14"/>
      <table:table table:name="BioInterpreti" table:style-name="BioInterpreti">
        <table:table-column table:style-name="BioInterpreti.A"/>
        <table:table-row table:style-name="BioInterpreti.1">
          <table:table-cell table:style-name="BioInterpreti.A1" office:value-type="string">
            <text:p text:style-name="P13"><text:span text:style-name="T6">Performers</text:span><text:span text:style-name="T3">’ biographies </text:span>(max <text:span text:style-name="T7">5</text:span>00 c<text:span text:style-name="T2">haracters</text:span>)</text:p>
          </table:table-cell>
        </table:table-row>
        <table:table-row table:style-name="BioInterpreti.2">
          <table:table-cell table:style-name="BioInterpreti.A2" office:value-type="string">
            <text:p text:style-name="P2"/>
          </table:table-cell>
        </table:table-row>
      </table:table>
      <text:p text:style-name="P14"/>
      <table:table table:name="TechRider" table:style-name="TechRider">
        <table:table-column table:style-name="TechRider.A"/>
        <table:table-row table:style-name="TechRider.1">
          <table:table-cell table:style-name="TechRider.A1" office:value-type="string">
            <text:p text:style-name="P15"><text:span text:style-name="T8">Technical rider </text:span><text:span text:style-name="T9">(max 1000 c</text:span><text:span text:style-name="T10">haracters</text:span><text:span text:style-name="T9">)</text:span></text:p>
          </table:table-cell>
        </table:table-row>
        <table:table-row table:style-name="TechRider.2">
          <table:table-cell table:style-name="TechRider.A2" office:value-type="string">
            <text:p text:style-name="P2"/>
          </table:table-cell>
        </table:table-row>
      </table:table>
      <text:p text:style-name="P16"/>
      <text:p text:style-name="P17">INSTRUCTIONS FOR COMPLETION OF THE APPLICATION FORM</text:p>
      <text:p text:style-name="P5"/>
      <text:p text:style-name="P18">For each submitted artistic proposal, it is mandatory to <text:span text:style-name="T1">provide </text:span>the <text:span text:style-name="T11">Application </text:span><text:span text:style-name="T12">fo</text:span><text:span text:style-name="T11">rm for the </text:span><text:span text:style-name="T12">s</text:span><text:span text:style-name="T11">election of </text:span><text:span text:style-name="T12">w</text:span><text:span text:style-name="T11">orks (</text:span><text:span text:style-name="T12">m</text:span><text:span text:style-name="T11">usic and </text:span><text:span text:style-name="T12">s</text:span><text:span text:style-name="T11">ound </text:span><text:span text:style-name="T12">a</text:span><text:span text:style-name="T11">rt)</text:span>, completed according to the instructions provided below. The description of the requested information indicates the required fields, unless otherwise specified.</text:p>
      <text:p text:style-name="P19"/>
      <text:p text:style-name="P20">Categor<text:span text:style-name="T1">y</text:span></text:p>
      <text:p text:style-name="P21"><text:span text:style-name="T13">O</text:span><text:span text:style-name="T14">ne of the </text:span><text:span text:style-name="T15">following </text:span><text:span text:style-name="T14">categories specified in the </text:span><text:span text:style-name="T16">Call for Works (music and sound art)</text:span></text:p>
      <text:list text:style-name="L1">
        <text:list-item>
          <text:p text:style-name="P22">Electroacoustic composition on fixed media</text:p>
        </text:list-item>
        <text:list-item>
          <text:p text:style-name="P22">Composition with instruments (or voice) and fixed media</text:p>
        </text:list-item>
        <text:list-item>
          <text:p text:style-name="P22">Composition with live electronics, with or without instruments</text:p>
        </text:list-item>
        <text:list-item>
          <text:p text:style-name="P22">Interactive mixed-media performance and live coding</text:p>
        </text:list-item>
        <text:list-item>
          <text:p text:style-name="P22">Audiovisual composition</text:p>
        </text:list-item>
        <text:list-item>
          <text:p text:style-name="P22">Multimedia installation</text:p>
        </text:list-item>
      </text:list>
      <text:p text:style-name="P23"/>
      <text:p text:style-name="P24">Titl<text:span text:style-name="T1">e</text:span></text:p>
      <text:p text:style-name="P25">Full title of the work as it should appear in programs and promotional materials.</text:p>
      <text:p text:style-name="P25"/>
      <text:p text:style-name="P24"><text:span text:style-name="T17">Sottot</text:span>itolo</text:p>
      <text:p text:style-name="P25">Full subtitle (if applicable) as it should appear in programs and promotional materials.</text:p>
      <text:p text:style-name="P26"/>
      <text:p text:style-name="P27">Year</text:p>
      <text:p text:style-name="P28">the year in which the work was composed.</text:p>
      <text:p text:style-name="P29"/>
      <text:p text:style-name="P30"><text:span text:style-name="T3">Authors<text:line-break/></text:span>First and last name of all authors, separated by commas.</text:p>
      <text:p text:style-name="P26"/>
      <text:p text:style-name="P26">Durat<text:span text:style-name="T1">ion</text:span></text:p>
      <text:p text:style-name="P19">Expected performance duration in HH:MM:SS format. If the duration is variable, specify the minimum and maximum acceptable duration.</text:p>
      <text:p text:style-name="P19"/>
      <text:p text:style-name="P31"><text:span text:style-name="T18">P</text:span><text:span text:style-name="T3">erformers</text:span></text:p>
      <text:p text:style-name="P19">First and last name of all performers identified by the authors, separated by commas.</text:p>
      <text:p text:style-name="P19"/>
      <text:p text:style-name="P32">Repository URL</text:p>
      <text:p text:style-name="P23">The URL(s) of the repository for materials that cannot be uploaded via EasyChair, required for the evaluation of the work and its performance (scores, multimedia content, etc.).</text:p>
      <text:p text:style-name="P19"/>
      <text:p text:style-name="P33">Work Presentation</text:p>
      <text:p text:style-name="P34">Summary of the work or performance, outlining its concept, structure, instruments, and any interpretative elements useful to the reviewers. The information will be used solely for the evaluation of the work and will not be published if selected. Maximum length: 2000 characters, including spaces.</text:p>
      <text:p text:style-name="P34"/>
      <text:p text:style-name="P35">Program Notes</text:p>
      <text:p text:style-name="P36">Brief description of the work as it should appear in programs and promotional materials. Maximum length: <text:span text:style-name="T19">10</text:span>00 characters, spaces included.</text:p>
      <text:p text:style-name="P19"/>
      <text:p text:style-name="P37">Authors’ Biographies</text:p>
      <text:p text:style-name="P38">First name, last name, place and year of birth, and biographical notes for each author of the work, in the form in which they should appear in programs and promotional materials. Maximum length: <text:span text:style-name="T19">5</text:span>00 characters, spaces included.</text:p>
      <text:p text:style-name="P38"/>
      <text:p text:style-name="P39">Performers’ Biographies </text:p>
      <text:p text:style-name="P40">First name, last name, role, and biographical notes related to the identified performers, in the form in which they should appear in programs and promotional materials. Maximum length: 500 characters, spaces included.</text:p>
      <text:p text:style-name="P19"/>
      <text:p text:style-name="P39">Technical Rider</text:p>
      <text:p text:style-name="P40">Essential technical information for the performance or installation of the work, such as required instruments or equipment, audio/video formats, and other logistical requirements. Maximum length: 1000 characters, spaces includ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rmal" style:family="paragraph">
      <style:paragraph-properties fo:margin-top="0cm" fo:margin-bottom="0cm" style:contextual-spacing="false" fo:text-align="left" style:justify-single-word="false" fo:orphans="0" fo:widows="0" style:writing-mode="lr-tb"/>
    </style:style>
    <style:style style:name="program_20_notes" style:display-name="program notes" style:family="paragraph" style:parent-style-name="normal">
      <loext:graphic-properties draw:fill="none" draw:fill-color="#ffffff"/>
      <style:paragraph-properties fo:margin-left="0cm" fo:margin-right="0.206cm" fo:margin-top="0cm" fo:margin-bottom="0cm" style:contextual-spacing="false" fo:line-height="100%" fo:text-align="justify"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font-style-complex="normal" style:font-weight-complex="norm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oNumPag" style:family="paragraph" style:parent-style-name="Footer">
      <style:paragraph-properties fo:text-align="center" style:justify-single-word="false"/>
      <style:text-properties style:font-name="Times New Roman" fo:font-family="'Times New Roman'" style:font-family-generic="roman" style:font-pitch="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text-align="center" style:justify-single-word="false"/>
      <style:text-properties style:font-name="Times New Roman"/>
    </style:style>
    <style:page-layout style:name="Mpm1">
      <style:page-layout-properties fo:page-width="21.001cm" fo:page-height="29.7cm" style:num-format="1" style:print-orientation="portrait" fo:margin-top="2cm" fo:margin-bottom="0.98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cm" fo:margin-top="0.499cm" fo:background-color="transparent" draw:fill="none" draw:fill-color="#729fcf"/>
      </style:footer-style>
    </style:page-layout>
    <style:page-layout style:name="Mpm2" style:page-usage="right">
      <style:page-layout-properties fo:page-width="21.001cm" fo:page-height="29.7cm" style:num-format="1" style:print-orientation="portrait" fo:margin-top="2cm" fo:margin-bottom="1.695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ile di pagina predefinito3"/><text:bookmark-start text:name="PageNumWizard_FOOTER_Stile di pagina predefinito2"/><text:page-number text:select-page="current">2</text:page-number><text:bookmark-end text:name="PageNumWizard_FOOTER_Stile di pagina predefinito3"/><text:bookmark-end text:name="PageNumWizard_FOOTER_Stile di pagina predefinito2"/></text:p>
      </style:footer>
    </style:master-page>
    <style:master-page style:name="Right_20_Page" style:display-name="Right Page" style:page-layout-name="Mpm2" draw:style-name="Mdp1" style:next-style-name="Left_20_Page"/>
    <style:master-page style:name="Left_20_Page" style:display-name="Left Page" style:page-layout-name="Mpm3" draw:style-name="Mdp1" style:next-style-name="Right_20_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30T22:53:04.513003600</meta:creation-date>
    <dc:date>2026-05-12T08:38:01.447009000</dc:date>
    <meta:editing-duration>PT45M18S</meta:editing-duration>
    <meta:editing-cycles>14</meta:editing-cycles>
    <meta:generator>LibreOffice/26.2.2.2$Windows_X86_64 LibreOffice_project/1f77d10d6938fd34972958f64b2bcfa54f8b1ba5</meta:generator>
    <dc:title>XXV CIM Colloquio di Informatica Musicale - Application form for works</dc:title>
    <meta:document-statistic meta:table-count="6" meta:image-count="0" meta:object-count="0" meta:page-count="3" meta:paragraph-count="53" meta:word-count="449" meta:character-count="3067" meta:non-whitespace-character-count="2676"/>
  </office:meta>
</office:document-meta>
</file>