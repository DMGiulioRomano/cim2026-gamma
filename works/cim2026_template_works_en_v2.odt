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OperaInfos" style:family="table">
      <style:table-properties style:width="6.8507in" table:align="left" style:writing-mode="lr-tb"/>
    </style:style>
    <style:style style:name="OperaInfos.A" style:family="table-column">
      <style:table-column-properties style:column-width="1.1653in"/>
    </style:style>
    <style:style style:name="OperaInfos.B" style:family="table-column">
      <style:table-column-properties style:column-width="1.1778in"/>
    </style:style>
    <style:style style:name="OperaInfos.C" style:family="table-column">
      <style:table-column-properties style:column-width="1.1785in"/>
    </style:style>
    <style:style style:name="OperaInfos.D" style:family="table-column">
      <style:table-column-properties style:column-width="1.1056in"/>
    </style:style>
    <style:style style:name="OperaInfos.E" style:family="table-column">
      <style:table-column-properties style:column-width="1.1826in"/>
    </style:style>
    <style:style style:name="OperaInfos.F" style:family="table-column">
      <style:table-column-properties style:column-width="1.041in"/>
    </style:style>
    <style:style style:name="OperaInfos.1" style:family="table-row">
      <style:table-row-properties style:min-row-height="0.1965in"/>
    </style:style>
    <style:style style:name="OperaInfos.A1" style:family="table-cell">
      <style:table-cell-properties style:vertical-align="middle" fo:padding="0.0194in" fo:border="0.05pt solid #808080" style:writing-mode="page"/>
    </style:style>
    <style:style style:name="OperaInfos.2" style:family="table-row">
      <style:table-row-properties style:min-row-height="0.3542in"/>
    </style:style>
    <style:style style:name="OperaInfos.A2" style:family="table-cell">
      <style:table-cell-properties style:vertical-align="middle" fo:padding="0.0194in" fo:border-left="0.05pt solid #808080" fo:border-right="none" fo:border-top="none" fo:border-bottom="0.05pt solid #808080" style:writing-mode="page"/>
    </style:style>
    <style:style style:name="OperaInfos.B2" style:family="table-cell">
      <style:table-cell-properties style:vertical-align="middle" fo:padding="0.0194in" fo:border-left="0.05pt solid #808080" fo:border-right="0.05pt solid #808080" fo:border-top="none" fo:border-bottom="0.05pt solid #808080" style:writing-mode="page"/>
    </style:style>
    <style:style style:name="OperaInfos.6" style:family="table-row">
      <style:table-row-properties style:min-row-height="0.5903in"/>
    </style:style>
    <style:style style:name="OperaInfos.A7" style:family="table-cell">
      <style:table-cell-properties style:vertical-align="middle" fo:padding-left="0.0194in" fo:padding-right="0in" fo:padding-top="0.0194in" fo:padding-bottom="0.0194in" fo:border-left="0.05pt solid #808080" fo:border-right="none" fo:border-top="none" fo:border-bottom="0.05pt solid #808080" style:writing-mode="page"/>
    </style:style>
    <style:style style:name="OperaInfos.B7" style:family="table-cell">
      <style:table-cell-properties style:vertical-align="middle" fo:padding-left="0.0194in" fo:padding-right="0in" fo:padding-top="0.0194in" fo:padding-bottom="0.0194in" fo:border-left="0.05pt solid #808080" fo:border-right="none" fo:border-top="0.05pt solid #808080" fo:border-bottom="0.05pt solid #808080" style:writing-mode="page"/>
    </style:style>
    <style:style style:name="OperaInfos.F7" style:family="table-cell">
      <style:table-cell-properties style:vertical-align="middle" fo:padding-left="0.0194in" fo:padding-right="0in" fo:padding-top="0.0194in" fo:padding-bottom="0.0194in" fo:border="0.05pt solid #808080" style:writing-mode="page"/>
    </style:style>
    <style:style style:name="OperaInfos.9" style:family="table-row">
      <style:table-row-properties style:min-row-height="0.7875in"/>
    </style:style>
    <style:style style:name="Tabella1" style:family="table">
      <style:table-properties style:width="6.6931in" table:align="margins" style:may-break-between-rows="false" style:writing-mode="lr-tb"/>
    </style:style>
    <style:style style:name="Tabella1.A" style:family="table-column">
      <style:table-column-properties style:column-width="6.6931in" style:rel-column-width="9638*"/>
    </style:style>
    <style:style style:name="Tabella1.1" style:family="table-row">
      <style:table-row-properties style:min-row-height="0.1965in"/>
    </style:style>
    <style:style style:name="Tabella1.A1" style:family="table-cell">
      <style:table-cell-properties style:vertical-align="middle" fo:padding="0.0194in" fo:border="0.05pt solid #808080" style:writing-mode="page"/>
    </style:style>
    <style:style style:name="Tabella1.2" style:family="table-row">
      <style:table-row-properties style:min-row-height="4.2917in"/>
    </style:style>
    <style:style style:name="Tabella1.A2" style:family="table-cell">
      <style:table-cell-properties fo:padding="0.0194in" fo:border-left="0.05pt solid #808080" fo:border-right="0.05pt solid #808080" fo:border-top="none" fo:border-bottom="0.05pt solid #808080" style:writing-mode="page"/>
    </style:style>
    <style:style style:name="ProgramNotes" style:family="table">
      <style:table-properties style:width="6.6931in" table:align="margins" style:may-break-between-rows="false" style:writing-mode="lr-tb"/>
    </style:style>
    <style:style style:name="ProgramNotes.A" style:family="table-column">
      <style:table-column-properties style:column-width="6.6931in" style:rel-column-width="65535*"/>
    </style:style>
    <style:style style:name="ProgramNotes.1" style:family="table-row">
      <style:table-row-properties style:min-row-height="0.1965in"/>
    </style:style>
    <style:style style:name="ProgramNotes.A1" style:family="table-cell">
      <style:table-cell-properties style:vertical-align="middle" fo:padding="0.0194in" fo:border="0.05pt solid #808080" style:writing-mode="page"/>
    </style:style>
    <style:style style:name="ProgramNotes.2" style:family="table-row">
      <style:table-row-properties style:min-row-height="2.7167in"/>
    </style:style>
    <style:style style:name="ProgramNotes.A2" style:family="table-cell">
      <style:table-cell-properties fo:padding="0.0194in" fo:border-left="0.05pt solid #808080" fo:border-right="0.05pt solid #808080" fo:border-top="none" fo:border-bottom="0.05pt solid #808080" style:writing-mode="page"/>
    </style:style>
    <style:style style:name="BioAutori" style:family="table">
      <style:table-properties style:width="6.6931in" table:align="margins" style:may-break-between-rows="false" style:writing-mode="lr-tb"/>
    </style:style>
    <style:style style:name="BioAutori.A" style:family="table-column">
      <style:table-column-properties style:column-width="6.6931in" style:rel-column-width="65535*"/>
    </style:style>
    <style:style style:name="BioAutori.1" style:family="table-row">
      <style:table-row-properties style:min-row-height="0.1965in"/>
    </style:style>
    <style:style style:name="BioAutori.A1" style:family="table-cell">
      <style:table-cell-properties style:vertical-align="middle" fo:padding="0.0194in" fo:border="0.05pt solid #808080" style:writing-mode="page"/>
    </style:style>
    <style:style style:name="BioAutori.2" style:family="table-row">
      <style:table-row-properties style:min-row-height="1.4174in"/>
    </style:style>
    <style:style style:name="BioAutori.A2" style:family="table-cell">
      <style:table-cell-properties fo:padding="0.0194in" fo:border-left="0.05pt solid #808080" fo:border-right="0.05pt solid #808080" fo:border-top="none" fo:border-bottom="0.05pt solid #808080" style:writing-mode="page"/>
    </style:style>
    <style:style style:name="BioInterpreti" style:family="table">
      <style:table-properties style:width="6.6931in" table:align="margins" style:may-break-between-rows="false" style:writing-mode="lr-tb"/>
    </style:style>
    <style:style style:name="BioInterpreti.A" style:family="table-column">
      <style:table-column-properties style:column-width="6.6931in" style:rel-column-width="65535*"/>
    </style:style>
    <style:style style:name="BioInterpreti.1" style:family="table-row">
      <style:table-row-properties style:min-row-height="0.1965in"/>
    </style:style>
    <style:style style:name="BioInterpreti.A1" style:family="table-cell">
      <style:table-cell-properties style:vertical-align="middle" fo:padding="0.0194in" fo:border="0.05pt solid #808080" style:writing-mode="page"/>
    </style:style>
    <style:style style:name="BioInterpreti.2" style:family="table-row">
      <style:table-row-properties style:min-row-height="1.3778in"/>
    </style:style>
    <style:style style:name="BioInterpreti.A2" style:family="table-cell">
      <style:table-cell-properties fo:padding="0.0194in" fo:border-left="0.05pt solid #808080" fo:border-right="0.05pt solid #808080" fo:border-top="none" fo:border-bottom="0.05pt solid #808080" style:writing-mode="page"/>
    </style:style>
    <style:style style:name="TechRider" style:family="table">
      <style:table-properties style:width="6.6931in" table:align="margins" style:may-break-between-rows="false" style:writing-mode="lr-tb"/>
    </style:style>
    <style:style style:name="TechRider.A" style:family="table-column">
      <style:table-column-properties style:column-width="6.6931in" style:rel-column-width="65535*"/>
    </style:style>
    <style:style style:name="TechRider.1" style:family="table-row">
      <style:table-row-properties style:min-row-height="0.1965in"/>
    </style:style>
    <style:style style:name="TechRider.A1" style:family="table-cell">
      <style:table-cell-properties style:vertical-align="middle" fo:padding="0.0194in" fo:border="0.05pt solid #808080" style:writing-mode="page"/>
    </style:style>
    <style:style style:name="TechRider.2" style:family="table-row">
      <style:table-row-properties style:min-row-height="2.7167in"/>
    </style:style>
    <style:style style:name="TechRider.A2" style:family="table-cell">
      <style:table-cell-properties fo:padding="0.0194in" fo:border-left="0.05pt solid #808080" fo:border-right="0.05pt solid #808080" fo:border-top="none" fo:border-bottom="0.05pt solid #808080" style:writing-mode="page"/>
    </style:style>
    <style:style style:name="P1" style:family="paragraph" style:parent-style-name="program_20_notes" style:master-page-name="Standard">
      <style:paragraph-properties style:page-number="1"/>
      <style:text-properties fo:font-size="16pt" fo:font-weight="bold" officeooo:paragraph-rsid="0007f7f5" style:font-size-asian="16pt" style:font-weight-asian="bold" style:font-size-complex="16pt" style:font-weight-complex="bold"/>
    </style:style>
    <style:style style:name="P2" style:family="paragraph" style:parent-style-name="program_20_notes">
      <style:text-properties officeooo:paragraph-rsid="0007f7f5"/>
    </style:style>
    <style:style style:name="P3" style:family="paragraph" style:parent-style-name="program_20_notes">
      <style:text-properties fo:font-weight="bold" officeooo:rsid="002be9c8" officeooo:paragraph-rsid="0007f7f5" style:font-weight-asian="bold" style:font-weight-complex="bold"/>
    </style:style>
    <style:style style:name="P4" style:family="paragraph" style:parent-style-name="Table_20_Heading">
      <style:paragraph-properties fo:text-align="start" style:justify-single-word="false"/>
      <style:text-properties style:font-name="Times New Roman" fo:font-size="12pt" officeooo:rsid="002d9518" officeooo:paragraph-rsid="0007f7f5" style:font-name-asian="Times New Roman1" style:font-size-asian="12pt" style:font-name-complex="Times New Roman1" style:font-size-complex="12pt"/>
    </style:style>
    <style:style style:name="P5" style:family="paragraph" style:parent-style-name="program_20_notes">
      <style:paragraph-properties fo:text-align="start" style:justify-single-word="false"/>
      <style:text-properties officeooo:paragraph-rsid="0007f7f5"/>
    </style:style>
    <style:style style:name="P6" style:family="paragraph" style:parent-style-name="Table_20_Contents">
      <style:paragraph-properties fo:text-align="justify" style:justify-single-word="false"/>
      <style:text-properties style:font-name="Times New Roman" fo:font-size="12pt" officeooo:paragraph-rsid="0007f7f5" style:font-name-asian="Times New Roman1" style:font-size-asian="12pt" style:font-name-complex="Times New Roman1" style:font-size-complex="12pt"/>
    </style:style>
    <style:style style:name="P7" style:family="paragraph" style:parent-style-name="program_20_notes">
      <style:text-properties officeooo:rsid="004aa9eb" officeooo:paragraph-rsid="00188474"/>
    </style:style>
    <style:style style:name="P8" style:family="paragraph" style:parent-style-name="program_20_notes">
      <style:paragraph-properties fo:text-align="start" style:justify-single-word="false"/>
      <style:text-properties fo:font-size="12pt" officeooo:rsid="00188474" officeooo:paragraph-rsid="00188474" style:font-size-asian="12pt" style:font-size-complex="12pt"/>
    </style:style>
    <style:style style:name="P9" style:family="paragraph" style:parent-style-name="program_20_notes">
      <style:text-properties officeooo:rsid="00266896" officeooo:paragraph-rsid="00188474"/>
    </style:style>
    <style:style style:name="P10" style:family="paragraph" style:parent-style-name="program_20_notes">
      <style:paragraph-properties fo:text-align="start" style:justify-single-word="false"/>
      <style:text-properties fo:font-size="10pt" officeooo:paragraph-rsid="0007f7f5" style:font-size-asian="10pt" style:font-size-complex="10pt"/>
    </style:style>
    <style:style style:name="P11" style:family="paragraph" style:parent-style-name="program_20_notes">
      <style:paragraph-properties fo:text-align="start" style:justify-single-word="false"/>
      <style:text-properties fo:font-size="12pt" officeooo:rsid="000f7c8c" officeooo:paragraph-rsid="000f7c8c" style:font-size-asian="12pt" style:font-size-complex="12pt"/>
    </style:style>
    <style:style style:name="P12" style:family="paragraph" style:parent-style-name="program_20_notes">
      <style:text-properties officeooo:rsid="002be9c8" officeooo:paragraph-rsid="0007f7f5"/>
    </style:style>
    <style:style style:name="P13" style:family="paragraph" style:parent-style-name="program_20_notes">
      <style:text-properties officeooo:rsid="002be9c8" officeooo:paragraph-rsid="00188474"/>
    </style:style>
    <style:style style:name="P14" style:family="paragraph" style:parent-style-name="Text_20_body">
      <style:text-properties fo:color="#000000" loext:opacity="100%" style:font-name="Times New Roman" officeooo:paragraph-rsid="0007f7f5" style:font-name-asian="Times New Roman1" style:font-size-asian="12pt" style:font-name-complex="Times New Roman1"/>
    </style:style>
    <style:style style:name="P15" style:family="paragraph" style:parent-style-name="Text_20_body">
      <loext:graphic-properties draw:fill-color="#ffffff"/>
      <style:paragraph-properties fo:line-height="100%" fo:text-align="justify" style:justify-single-word="false" fo:orphans="0" fo:widows="0"/>
      <style:text-properties fo:color="#000000" loext:opacity="100%" style:font-name="Times New Roman" style:font-name-asian="Times New Roman1" style:font-size-asian="12pt" style:font-name-complex="Times New Roman1"/>
    </style:style>
    <style:style style:name="P16" style:family="paragraph" style:parent-style-name="Text_20_body">
      <loext:graphic-properties draw:fill-color="#ffffff"/>
      <style:paragraph-properties fo:line-height="100%" fo:text-align="justify" style:justify-single-word="false" fo:orphans="0" fo:widows="0"/>
    </style:style>
    <style:style style:name="P17" style:family="paragraph" style:parent-style-name="Standard">
      <style:text-properties officeooo:rsid="002be9c8" officeooo:paragraph-rsid="0007f7f5"/>
    </style:style>
    <style:style style:name="P18" style:family="paragraph" style:parent-style-name="Text_20_body">
      <style:text-properties officeooo:paragraph-rsid="0007f7f5"/>
    </style:style>
    <style:style style:name="P19" style:family="paragraph" style:parent-style-name="program_20_notes">
      <style:text-properties fo:font-weight="bold" officeooo:rsid="002f5351" officeooo:paragraph-rsid="00188474" style:font-weight-asian="bold" style:font-weight-complex="bold"/>
    </style:style>
    <style:style style:name="P20" style:family="paragraph" style:parent-style-name="program_20_notes">
      <style:text-properties fo:font-weight="bold" officeooo:paragraph-rsid="0007f7f5" style:font-weight-asian="bold" style:font-weight-complex="bold"/>
    </style:style>
    <style:style style:name="P21" style:family="paragraph" style:parent-style-name="program_20_notes" style:master-page-name="Right_20_Page">
      <style:paragraph-properties style:page-number="auto"/>
      <style:text-properties fo:font-weight="bold" officeooo:paragraph-rsid="0007f7f5" style:font-weight-asian="bold" style:font-weight-complex="bold"/>
    </style:style>
    <style:style style:name="P22" style:family="paragraph" style:parent-style-name="program_20_notes">
      <style:text-properties fo:font-size="10.5pt" officeooo:rsid="003ba395" officeooo:paragraph-rsid="00188474" style:font-size-asian="10.5pt" style:font-size-complex="10.5pt"/>
    </style:style>
    <style:style style:name="P23" style:family="paragraph" style:parent-style-name="program_20_notes">
      <style:text-properties fo:font-size="10.5pt" officeooo:paragraph-rsid="0007f7f5" style:font-size-asian="10.5pt" style:font-size-complex="10.5pt"/>
    </style:style>
    <style:style style:name="P24" style:family="paragraph" style:parent-style-name="program_20_notes">
      <style:text-properties fo:font-size="10.5pt" fo:font-weight="bold" officeooo:paragraph-rsid="001248ed" style:font-size-asian="10.5pt" style:font-weight-asian="bold" style:font-size-complex="10.5pt" style:font-weight-complex="bold"/>
    </style:style>
    <style:style style:name="P25" style:family="paragraph" style:parent-style-name="program_20_notes">
      <style:paragraph-properties fo:line-height="150%"/>
      <style:text-properties fo:font-size="10.5pt" fo:font-weight="normal" officeooo:paragraph-rsid="00188474" style:font-size-asian="10.5pt" style:font-weight-asian="normal" style:font-size-complex="10.5pt" style:font-weight-complex="normal"/>
    </style:style>
    <style:style style:name="P26" style:family="paragraph" style:parent-style-name="program_20_notes" style:list-style-name="L1">
      <style:text-properties fo:font-size="10.5pt" fo:font-weight="normal" officeooo:paragraph-rsid="00188474" style:font-size-asian="10.5pt" style:font-weight-asian="normal" style:font-size-complex="10.5pt" style:font-weight-complex="normal"/>
    </style:style>
    <style:style style:name="P27" style:family="paragraph" style:parent-style-name="program_20_notes">
      <style:text-properties fo:font-size="10.5pt" officeooo:paragraph-rsid="001248ed" style:font-size-asian="10.5pt" style:font-size-complex="10.5pt"/>
    </style:style>
    <style:style style:name="P28" style:family="paragraph" style:parent-style-name="program_20_notes">
      <style:text-properties fo:font-size="10.5pt" fo:font-weight="bold" officeooo:rsid="0027f3ad" officeooo:paragraph-rsid="0007f7f5" style:font-size-asian="10.5pt" style:font-weight-asian="bold" style:font-size-complex="10.5pt" style:font-weight-complex="bold"/>
    </style:style>
    <style:style style:name="P29" style:family="paragraph" style:parent-style-name="program_20_notes">
      <style:text-properties fo:font-size="10.5pt" fo:font-weight="normal" officeooo:rsid="0032888d" officeooo:paragraph-rsid="0007f7f5" style:font-size-asian="10.5pt" style:font-weight-asian="normal" style:font-size-complex="10.5pt" style:font-weight-complex="normal"/>
    </style:style>
    <style:style style:name="P30" style:family="paragraph" style:parent-style-name="program_20_notes">
      <style:text-properties fo:font-size="10.5pt" fo:font-weight="bold" officeooo:paragraph-rsid="0007f7f5" style:font-size-asian="10.5pt" style:font-weight-asian="bold" style:font-size-complex="10.5pt" style:font-weight-complex="bold"/>
    </style:style>
    <style:style style:name="P31" style:family="paragraph" style:parent-style-name="program_20_notes">
      <style:text-properties fo:font-size="10.5pt" fo:font-weight="bold" officeooo:rsid="00188474" officeooo:paragraph-rsid="00188474" style:font-size-asian="10.5pt" style:font-weight-asian="bold" style:font-size-complex="10.5pt" style:font-weight-complex="bold"/>
    </style:style>
    <style:style style:name="P32" style:family="paragraph" style:parent-style-name="program_20_notes">
      <style:text-properties fo:font-size="10.5pt" fo:font-weight="normal" officeooo:rsid="001248ed" officeooo:paragraph-rsid="001248ed" style:font-size-asian="10.5pt" style:font-weight-asian="normal" style:font-size-complex="10.5pt" style:font-weight-complex="normal"/>
    </style:style>
    <style:style style:name="P33" style:family="paragraph" style:parent-style-name="program_20_notes">
      <style:text-properties fo:font-size="10.5pt" fo:font-weight="normal" officeooo:rsid="0032888d" officeooo:paragraph-rsid="001248ed" style:font-size-asian="10.5pt" style:font-weight-asian="normal" style:font-size-complex="10.5pt" style:font-weight-complex="normal"/>
    </style:style>
    <style:style style:name="P34" style:family="paragraph" style:parent-style-name="program_20_notes">
      <style:text-properties fo:font-size="10.5pt" fo:font-weight="normal" officeooo:paragraph-rsid="00188474" style:font-size-asian="10.5pt" style:font-weight-asian="normal" style:font-size-complex="10.5pt" style:font-weight-complex="normal"/>
    </style:style>
    <style:style style:name="P35" style:family="paragraph" style:parent-style-name="program_20_notes">
      <style:text-properties fo:font-size="10.5pt" officeooo:rsid="00188474" officeooo:paragraph-rsid="00188474" style:font-size-asian="10.5pt" style:font-size-complex="10.5pt"/>
    </style:style>
    <style:style style:name="P36" style:family="paragraph" style:parent-style-name="program_20_notes">
      <style:text-properties fo:font-size="10.5pt" fo:font-weight="bold" officeooo:rsid="001248ed" officeooo:paragraph-rsid="001248ed" style:font-size-asian="10.5pt" style:font-weight-asian="bold" style:font-size-complex="10.5pt" style:font-weight-complex="bold"/>
    </style:style>
    <style:style style:name="P37" style:family="paragraph" style:parent-style-name="program_20_notes">
      <style:text-properties fo:font-size="10.5pt" fo:font-weight="bold" officeooo:rsid="0032888d" officeooo:paragraph-rsid="0007f7f5" style:font-size-asian="10.5pt" style:font-weight-asian="bold" style:font-size-complex="10.5pt" style:font-weight-complex="bold"/>
    </style:style>
    <style:style style:name="P38" style:family="paragraph" style:parent-style-name="program_20_notes">
      <style:text-properties fo:font-variant="normal" fo:text-transform="none" fo:color="#000000" loext:opacity="100%" style:text-line-through-style="none" style:text-line-through-type="none" style:text-position="0% 100%" fo:font-size="10.5pt" fo:font-style="normal" style:text-underline-style="none" fo:font-weight="normal" officeooo:paragraph-rsid="0007f7f5" fo:background-color="transparent" style:font-name-asian="Times New Roman1" style:font-size-asian="10.5pt" style:font-style-asian="normal" style:font-weight-asian="normal" style:font-name-complex="Times New Roman1" style:font-size-complex="10.5pt" style:font-style-complex="normal" style:font-weight-complex="normal"/>
    </style:style>
    <style:style style:name="P39" style:family="paragraph" style:parent-style-name="program_20_notes">
      <style:text-properties fo:font-variant="normal" fo:text-transform="none" fo:color="#000000" loext:opacity="100%" style:text-line-through-style="none" style:text-line-through-type="none" style:text-position="0% 100%" fo:font-size="10.5pt" fo:font-style="normal" style:text-underline-style="none" fo:font-weight="bold" officeooo:paragraph-rsid="0007f7f5" fo:background-color="transparent" style:font-name-asian="Times New Roman1" style:font-size-asian="10.5pt" style:font-style-asian="normal" style:font-weight-asian="bold" style:font-name-complex="Times New Roman1" style:font-size-complex="10.5pt" style:font-style-complex="normal" style:font-weight-complex="bold"/>
    </style:style>
    <style:style style:name="P40" style:family="paragraph" style:parent-style-name="program_20_notes">
      <style:text-properties fo:font-variant="normal" fo:text-transform="none" fo:color="#000000" loext:opacity="100%" style:text-line-through-style="none" style:text-line-through-type="none" style:text-position="0% 100%" fo:font-size="10.5pt" fo:font-style="normal" style:text-underline-style="none" fo:font-weight="normal" officeooo:rsid="0032888d" officeooo:paragraph-rsid="0013d445" fo:background-color="transparent" style:font-name-asian="Times New Roman1" style:font-size-asian="10.5pt" style:font-style-asian="normal" style:font-weight-asian="normal" style:font-name-complex="Times New Roman1" style:font-size-complex="10.5pt" style:font-style-complex="normal" style:font-weight-complex="normal"/>
    </style:style>
    <style:style style:name="P41" style:family="paragraph" style:parent-style-name="program_20_notes">
      <style:text-properties fo:font-variant="normal" fo:text-transform="none" fo:color="#000000" loext:opacity="100%" style:text-line-through-style="none" style:text-line-through-type="none" style:text-position="0% 100%" fo:font-size="10.5pt" fo:font-style="normal" style:text-underline-style="none" fo:font-weight="bold" officeooo:rsid="0032888d" officeooo:paragraph-rsid="0018f059" fo:background-color="transparent" style:font-name-asian="Times New Roman1" style:font-size-asian="10.5pt" style:font-style-asian="normal" style:font-weight-asian="bold" style:font-name-complex="Times New Roman1" style:font-size-complex="10.5pt" style:font-style-complex="normal" style:font-weight-complex="bold"/>
    </style:style>
    <style:style style:name="P42" style:family="paragraph" style:parent-style-name="program_20_notes">
      <style:text-properties fo:font-variant="normal" fo:text-transform="none" fo:color="#000000" loext:opacity="100%" style:text-line-through-style="none" style:text-line-through-type="none" fo:font-size="10.5pt" fo:font-style="normal" style:text-underline-style="none" fo:font-weight="normal" officeooo:rsid="0032888d" officeooo:paragraph-rsid="0018f059" fo:background-color="transparent" style:font-name-asian="Times New Roman1" style:font-size-asian="10.5pt" style:font-style-asian="normal" style:font-weight-asian="normal" style:font-name-complex="Times New Roman1" style:font-size-complex="10.5pt" style:font-style-complex="normal" style:font-weight-complex="normal"/>
    </style:style>
    <style:style style:name="P43" style:family="paragraph" style:parent-style-name="program_20_notes">
      <style:text-properties fo:font-variant="normal" fo:text-transform="none" fo:color="#000000" loext:opacity="100%" style:text-line-through-style="none" style:text-line-through-type="none" style:text-position="0% 100%" fo:font-size="10.5pt" fo:font-style="normal" style:text-underline-style="none" fo:font-weight="bold" officeooo:rsid="0032888d" officeooo:paragraph-rsid="0007f7f5" fo:background-color="transparent" style:font-name-asian="Times New Roman1" style:font-size-asian="10.5pt" style:font-style-asian="normal" style:font-weight-asian="bold" style:font-name-complex="Times New Roman1" style:font-size-complex="10.5pt" style:font-style-complex="normal" style:font-weight-complex="bold"/>
    </style:style>
    <style:style style:name="P44" style:family="paragraph" style:parent-style-name="program_20_notes">
      <style:text-properties fo:font-variant="normal" fo:text-transform="none" fo:color="#000000" loext:opacity="100%" style:text-line-through-style="none" style:text-line-through-type="none" fo:font-size="10.5pt" fo:font-style="normal" style:text-underline-style="none" fo:font-weight="normal" officeooo:rsid="0032888d" officeooo:paragraph-rsid="0007f7f5" fo:background-color="transparent" style:font-name-asian="Times New Roman1" style:font-size-asian="10.5pt" style:font-style-asian="normal" style:font-weight-asian="normal" style:font-name-complex="Times New Roman1" style:font-size-complex="10.5pt" style:font-style-complex="normal" style:font-weight-complex="normal"/>
    </style:style>
    <style:style style:name="T1" style:family="text">
      <style:text-properties officeooo:rsid="00188474"/>
    </style:style>
    <style:style style:name="T2" style:family="text">
      <style:text-properties officeooo:rsid="004aa9eb"/>
    </style:style>
    <style:style style:name="T3" style:family="text">
      <style:text-properties fo:font-weight="bold" style:font-weight-asian="bold" style:font-weight-complex="bold"/>
    </style:style>
    <style:style style:name="T4" style:family="text">
      <style:text-properties officeooo:rsid="0032f9ed"/>
    </style:style>
    <style:style style:name="T5" style:family="text">
      <style:text-properties officeooo:rsid="00453616"/>
    </style:style>
    <style:style style:name="T6" style:family="text">
      <style:text-properties fo:color="#000000" loext:opacity="100%" style:font-name="Times New Roman" style:font-name-asian="Times New Roman1" style:font-size-asian="12pt" style:font-name-complex="Times New Roman1"/>
    </style:style>
    <style:style style:name="T7" style:family="text">
      <style:text-properties fo:font-weight="bold" officeooo:rsid="004aa9eb"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2f5351"/>
    </style:style>
    <style:style style:name="T10" style:family="text">
      <style:text-properties officeooo:rsid="002be9c8"/>
    </style:style>
    <style:style style:name="T11" style:family="text">
      <style:text-properties fo:font-weight="normal" officeooo:rsid="002be9c8" style:font-weight-asian="normal" style:font-weight-complex="normal"/>
    </style:style>
    <style:style style:name="T12" style:family="text">
      <style:text-properties fo:font-weight="normal" officeooo:rsid="004aa9eb"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0c9b36" style:font-style-asian="italic" style:font-weight-asian="normal" style:font-style-complex="italic" style:font-weight-complex="normal"/>
    </style:style>
    <style:style style:name="T15" style:family="text">
      <style:text-properties fo:font-style="normal" officeooo:rsid="00188474" style:font-style-asian="normal" style:font-style-complex="normal"/>
    </style:style>
    <style:style style:name="T16" style:family="text">
      <style:text-properties fo:font-style="normal" officeooo:rsid="00212cbd" style:font-style-asian="normal" style:font-style-complex="normal"/>
    </style:style>
    <style:style style:name="T17" style:family="text">
      <style:text-properties fo:font-style="normal" officeooo:rsid="000ba8dd" style:font-style-asian="normal" style:font-style-complex="normal"/>
    </style:style>
    <style:style style:name="T18" style:family="text">
      <style:text-properties fo:font-style="italic" officeooo:rsid="00212cbd" style:font-style-asian="italic" style:font-style-complex="italic"/>
    </style:style>
    <style:style style:name="T19" style:family="text">
      <style:text-properties officeooo:rsid="0032888d"/>
    </style:style>
    <style:style style:name="T20" style:family="text">
      <style:text-properties fo:font-weight="bold" officeooo:rsid="0027f3ad" style:font-weight-asian="bold" style:font-weight-complex="bold"/>
    </style:style>
    <style:style style:name="T21" style:family="text">
      <style:text-properties officeooo:rsid="001cc545"/>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XXV CIM Colloquio di Informatica Musicale</text:p>
      <text:p text:style-name="P2">L’Aquila | October 13-16, 2026</text:p>
      <text:p text:style-name="P2"/>
      <text:p text:style-name="P2"/>
      <text:p text:style-name="P3">APPLICATION FORM FOR THE SELECTION OF WORKS (music and sound art)</text:p>
      <text:p text:style-name="P2"/>
      <text:p text:style-name="P2"/>
      <table:table table:name="OperaInfos" table:style-name="OperaInfos">
        <table:table-column table:style-name="OperaInfos.A"/>
        <table:table-column table:style-name="OperaInfos.B"/>
        <table:table-column table:style-name="OperaInfos.C"/>
        <table:table-column table:style-name="OperaInfos.D"/>
        <table:table-column table:style-name="OperaInfos.E"/>
        <table:table-column table:style-name="OperaInfos.F"/>
        <table:table-header-rows>
          <table:table-row table:style-name="OperaInfos.1">
            <table:table-cell table:style-name="OperaInfos.A1" table:number-columns-spanned="6" office:value-type="string">
              <text:p text:style-name="P4">Opera</text:p>
            </table:table-cell>
            <table:covered-table-cell/>
            <table:covered-table-cell/>
            <table:covered-table-cell/>
            <table:covered-table-cell/>
            <table:covered-table-cell/>
          </table:table-row>
        </table:table-header-rows>
        <table:table-row table:style-name="OperaInfos.2">
          <table:table-cell table:style-name="OperaInfos.A2" office:value-type="string">
            <text:p text:style-name="P5">Category</text:p>
          </table:table-cell>
          <table:table-cell table:style-name="OperaInfos.B2" table:number-columns-spanned="5" office:value-type="string">
            <text:p text:style-name="P6">Electroacoustic composition on fixed media</text:p>
          </table:table-cell>
          <table:covered-table-cell/>
          <table:covered-table-cell/>
          <table:covered-table-cell/>
          <table:covered-table-cell/>
        </table:table-row>
        <table:table-row table:style-name="OperaInfos.2">
          <table:table-cell table:style-name="OperaInfos.A2" office:value-type="string">
            <text:p text:style-name="P5">Titl<text:span text:style-name="T1">e</text:span></text:p>
          </table:table-cell>
          <table:table-cell table:style-name="OperaInfos.B2" table:number-columns-spanned="5" office:value-type="string">
            <text:p text:style-name="P6">Gamma</text:p>
          </table:table-cell>
          <table:covered-table-cell/>
          <table:covered-table-cell/>
          <table:covered-table-cell/>
          <table:covered-table-cell/>
        </table:table-row>
        <table:table-row table:style-name="OperaInfos.2">
          <table:table-cell table:style-name="OperaInfos.A2" office:value-type="string">
            <text:p text:style-name="P7">Subtitle</text:p>
          </table:table-cell>
          <table:table-cell table:style-name="OperaInfos.B2" table:number-columns-spanned="5" office:value-type="string">
            <text:p text:style-name="P6"/>
          </table:table-cell>
          <table:covered-table-cell/>
          <table:covered-table-cell/>
          <table:covered-table-cell/>
          <table:covered-table-cell/>
        </table:table-row>
        <table:table-row table:style-name="OperaInfos.2">
          <table:table-cell table:style-name="OperaInfos.A2" office:value-type="string">
            <text:p text:style-name="P8">Year</text:p>
          </table:table-cell>
          <table:table-cell table:style-name="OperaInfos.B2" table:number-columns-spanned="5" office:value-type="string">
            <text:p text:style-name="P6">2026</text:p>
          </table:table-cell>
          <table:covered-table-cell/>
          <table:covered-table-cell/>
          <table:covered-table-cell/>
          <table:covered-table-cell/>
        </table:table-row>
        <table:table-row table:style-name="OperaInfos.6">
          <table:table-cell table:style-name="OperaInfos.A2" office:value-type="string">
            <text:p text:style-name="P9">Aut<text:span text:style-name="T2">hors</text:span></text:p>
          </table:table-cell>
          <table:table-cell table:style-name="OperaInfos.B2" table:number-columns-spanned="5" office:value-type="string">
            <text:p text:style-name="P6">Giulio Romano De Mattia</text:p>
          </table:table-cell>
          <table:covered-table-cell/>
          <table:covered-table-cell/>
          <table:covered-table-cell/>
          <table:covered-table-cell/>
        </table:table-row>
        <table:table-row table:style-name="OperaInfos.2">
          <table:table-cell table:style-name="OperaInfos.A7" office:value-type="string">
            <text:p text:style-name="P10">Expected duration</text:p>
          </table:table-cell>
          <table:table-cell table:style-name="OperaInfos.B7" office:value-type="string">
            <text:p text:style-name="P6">00:07:44</text:p>
          </table:table-cell>
          <table:table-cell table:style-name="OperaInfos.B7" office:value-type="string">
            <text:p text:style-name="P10">Minimum duration</text:p>
          </table:table-cell>
          <table:table-cell table:style-name="OperaInfos.B7" office:value-type="string">
            <text:p text:style-name="P6"/>
          </table:table-cell>
          <table:table-cell table:style-name="OperaInfos.B7" office:value-type="string">
            <text:p text:style-name="P10">Maximum duration</text:p>
          </table:table-cell>
          <table:table-cell table:style-name="OperaInfos.F7" office:value-type="string">
            <text:p text:style-name="P6"/>
          </table:table-cell>
        </table:table-row>
        <table:table-row table:style-name="OperaInfos.6">
          <table:table-cell table:style-name="OperaInfos.A2" office:value-type="string">
            <text:p text:style-name="P7">Performers</text:p>
          </table:table-cell>
          <table:table-cell table:style-name="OperaInfos.B2" table:number-columns-spanned="5" office:value-type="string">
            <text:p text:style-name="P6"/>
          </table:table-cell>
          <table:covered-table-cell/>
          <table:covered-table-cell/>
          <table:covered-table-cell/>
          <table:covered-table-cell/>
        </table:table-row>
        <table:table-row table:style-name="OperaInfos.9">
          <table:table-cell table:style-name="OperaInfos.A2" office:value-type="string">
            <text:p text:style-name="P11">Repository URL<text:span text:style-name="T1">(s)</text:span></text:p>
          </table:table-cell>
          <table:table-cell table:style-name="OperaInfos.B2" table:number-columns-spanned="5" office:value-type="string">
            <text:p text:style-name="P6">Audio (WAV 48 kHz / 24-bit, stereo): https://drive.google.com/file/d/1DFaRORUAwgChErPTUqlikodj9wXkLdaB/view?usp=sharing</text:p>
            <text:p text:style-name="P6">Source code: https://github.com/DMGiulioRomano/GAMMA (tag: cim2026-submission)</text:p>
          </table:table-cell>
          <table:covered-table-cell/>
          <table:covered-table-cell/>
          <table:covered-table-cell/>
          <table:covered-table-cell/>
        </table:table-row>
      </table:table>
      <text:p text:style-name="P12"/>
      <table:table table:name="Tabella1" table:style-name="Tabella1">
        <table:table-column table:style-name="Tabella1.A"/>
        <text:soft-page-break/>
        <table:table-row table:style-name="Tabella1.1">
          <table:table-cell table:style-name="Tabella1.A1" office:value-type="string">
            <text:p text:style-name="P13"><text:span text:style-name="T3">Work presentation </text:span>(max <text:span text:style-name="T4">2000</text:span> c<text:span text:style-name="T2">haracters</text:span><text:span text:style-name="T5">)</text:span></text:p>
          </table:table-cell>
        </table:table-row>
        <table:table-row table:style-name="Tabella1.2">
          <table:table-cell table:style-name="Tabella1.A2" office:value-type="string">
            <text:p text:style-name="P14">Gamma (7'44", stereo fixed media) is generated by a YAML-to-Csound pipeline. The score is a field of tendency masks: for each parameter, a range sampled stochastically per event.</text:p>
            <text:p text:style-name="P15">One integer per event, the rhythmic value, drives four dimensions of the synthesis. In time it subdivides a reference duration into intervals of duration/n: high values pack events, low values thin them. In pitch it offsets the reading index into a tuning table, walking the event into a dense microtonal cloud. In space it divides the stereo circle: the event sweeps an arc of 2π/n radians in the Mid/Side plane, one nth of a full rotation, a spatial harmonic. In amplitude it acts through pitch.</text:p>
            <text:p text:style-name="P15">The rhythmic stream generates itself: each value is a function of the previous one, a discrete dynamical system whose orbit becomes the music. From a short seed it unfolds through a non-linear feedback map, a logistic map at its core in the chaotic regime. I set the seed and the regime; the values follow.</text:p>
            <text:p text:style-name="P15">Pitch lives in a Pythagorean tuning of 200 intervals per octave, pure fifths stacked and reduced to the octave, after Walter Branchi. The chain of fifths never closes, so neighbouring pitches fall a few hertz apart, and when two voices land on adjacent degrees, beating zones open on their own.</text:p>
            <text:p text:style-name="P15">Loudness is treated as perception: a dynamic specifies a level in Phon. Through the ISO 226:2003 equal-loudness contours it computes the amplitude each frequency needs for that level, so high and low pitches at the same marking sound equally loud.</text:p>
            <text:p text:style-name="P15">Each layer holds a musical state: static, or in transition between an initial and a final mask across its lifespan. The work moves through six sections: the slow birth of clusters, a glissando solo, clouds thickening into a swarm, a rupture, one massive cluster, a closing ultra-glissando.</text:p>
            <text:p text:style-name="P16"><text:span text:style-name="T6">The working time is deferred: specify, render offline, listen, rewrite. That deferral is deliberate: I judge the orbit of the system, then rewrite the rules that produce it.</text:span></text:p>
          </table:table-cell>
        </table:table-row>
      </table:table>
      <text:p text:style-name="P17"/>
      <table:table table:name="ProgramNotes" table:style-name="ProgramNotes">
        <table:table-column table:style-name="ProgramNotes.A"/>
        <table:table-row table:style-name="ProgramNotes.1">
          <table:table-cell table:style-name="ProgramNotes.A1" office:value-type="string">
            <text:p text:style-name="P13"><text:span text:style-name="T7">Program notes</text:span><text:span text:style-name="T3"> </text:span>(max 1000 c<text:span text:style-name="T2">haracters</text:span>)</text:p>
          </table:table-cell>
        </table:table-row>
        <table:table-row table:style-name="ProgramNotes.2">
          <table:table-cell table:style-name="ProgramNotes.A2" office:value-type="string">
            <text:p text:style-name="Standard"><text:span text:style-name="T8">Gamma</text:span> is where the <text:span text:style-name="T8">Delta</text:span> cycle begins. <text:span text:style-name="T8">Delta</text:span> is the river's mouth: tributaries, sediment, accumulation. <text:span text:style-name="T8">Gamma</text:span>, its spring. </text:p>
            <text:p text:style-name="Standard">The piece dwells in musical states of transition. </text:p>
            <text:p text:style-name="Standard">Rhythmic figures weave a moving texture; timbres emerge from it, thin, and disperse, stretching across time until they unfold as space. </text:p>
            <text:p text:style-name="Standard">All that <text:span text:style-name="T8">Delta</text:span> gathers, <text:span text:style-name="T8">Gamma</text:span> reduces to a first gesture: a cry becoming sound, and sound becoming space. </text:p>
            <text:p text:style-name="Standard">For <text:span text:style-name="T8">Intero</text:span> and <text:span text:style-name="T8">Lontano</text:span></text:p>
          </table:table-cell>
        </table:table-row>
      </table:table>
      <text:p text:style-name="P12"/>
      <table:table table:name="BioAutori" table:style-name="BioAutori">
        <table:table-column table:style-name="BioAutori.A"/>
        <text:soft-page-break/>
        <table:table-row table:style-name="BioAutori.1">
          <table:table-cell table:style-name="BioAutori.A1" office:value-type="string">
            <text:p text:style-name="P13"><text:span text:style-name="T3">Authors’ biographies </text:span>(max <text:span text:style-name="T9">5</text:span>00 c<text:span text:style-name="T2">haracters</text:span>)</text:p>
          </table:table-cell>
        </table:table-row>
        <table:table-row table:style-name="BioAutori.2">
          <table:table-cell table:style-name="BioAutori.A2" office:value-type="string">
            <text:p text:style-name="P18"><text:span text:style-name="T6">Giulio Romano De Mattia (Rome, 2000) is an electroacoustic music composer working on feedback systems and algorithmic composition, with a particular focus on the meaning of fixed media today. He holds a Bachelor's degree in Electronic Music from the Conservatory of Santa Cecilia in Rome, where he studied with Nicola Bernardini, and is currently pursuing a Master's degree in Electronic Music at the Conservatory of L'Aquila with Agostino Di Scipio.</text:span></text:p>
          </table:table-cell>
        </table:table-row>
      </table:table>
      <text:p text:style-name="P17"/>
      <table:table table:name="BioInterpreti" table:style-name="BioInterpreti">
        <table:table-column table:style-name="BioInterpreti.A"/>
        <table:table-row table:style-name="BioInterpreti.1">
          <table:table-cell table:style-name="BioInterpreti.A1" office:value-type="string">
            <text:p text:style-name="P13"><text:span text:style-name="T7">Performers</text:span><text:span text:style-name="T3">’ biographies </text:span>(max <text:span text:style-name="T9">5</text:span>00 c<text:span text:style-name="T2">haracters</text:span>)</text:p>
          </table:table-cell>
        </table:table-row>
        <table:table-row table:style-name="BioInterpreti.2">
          <table:table-cell table:style-name="BioInterpreti.A2" office:value-type="string">
            <text:p text:style-name="P2"/>
          </table:table-cell>
        </table:table-row>
      </table:table>
      <text:p text:style-name="P17"/>
      <table:table table:name="TechRider" table:style-name="TechRider">
        <table:table-column table:style-name="TechRider.A"/>
        <table:table-row table:style-name="TechRider.1">
          <table:table-cell table:style-name="TechRider.A1" office:value-type="string">
            <text:p text:style-name="P19"><text:span text:style-name="T10">Technical rider </text:span><text:span text:style-name="T11">(max 1000 c</text:span><text:span text:style-name="T12">haracters</text:span><text:span text:style-name="T11">)</text:span></text:p>
          </table:table-cell>
        </table:table-row>
        <table:table-row table:style-name="TechRider.2">
          <table:table-cell table:style-name="TechRider.A2" office:value-type="string">
            <text:p text:style-name="P18"><text:span text:style-name="T6">Gamma is a native stereo (L/R) fixed-media work. Standard stereo playback is the reference format and fully sufficient. Multichannel diffusion is welcome where conditions allow (the work is Mid-Side encoded, so its spatial information spans the full horizontal 360° rather than only the frontal image of discrete L/R stereo; on periphonic systems such as quadraphonic or octophonic, a suitable decoding can be provided on request — though it is not essential), but not required. No specific mixer or equipment requirements.</text:span></text:p>
          </table:table-cell>
        </table:table-row>
      </table:table>
      <text:p text:style-name="P20"/>
      <text:p text:style-name="P21">INSTRUCTIONS FOR COMPLETION OF THE APPLICATION FORM</text:p>
      <text:p text:style-name="P5"/>
      <text:p text:style-name="P22">For each submitted artistic proposal, it is mandatory to <text:span text:style-name="T1">provide </text:span>the <text:span text:style-name="T13">Application </text:span><text:span text:style-name="T14">fo</text:span><text:span text:style-name="T13">rm for the </text:span><text:span text:style-name="T14">s</text:span><text:span text:style-name="T13">election of </text:span><text:span text:style-name="T14">w</text:span><text:span text:style-name="T13">orks (</text:span><text:span text:style-name="T14">m</text:span><text:span text:style-name="T13">usic and </text:span><text:span text:style-name="T14">s</text:span><text:span text:style-name="T13">ound </text:span><text:span text:style-name="T14">a</text:span><text:span text:style-name="T13">rt)</text:span>, completed according to the instructions provided below. The description of the requested information indicates the required fields, unless otherwise specified.</text:p>
      <text:p text:style-name="P23"/>
      <text:p text:style-name="P24">Categor<text:span text:style-name="T1">y</text:span></text:p>
      <text:p text:style-name="P25"><text:span text:style-name="T15">O</text:span><text:span text:style-name="T16">ne of the </text:span><text:span text:style-name="T17">following </text:span><text:span text:style-name="T16">categories specified in the </text:span><text:span text:style-name="T18">Call for Works (music and sound art)</text:span></text:p>
      <text:list text:style-name="L1">
        <text:list-item>
          <text:p text:style-name="P26">Electroacoustic composition on fixed media</text:p>
        </text:list-item>
        <text:list-item>
          <text:p text:style-name="P26">Composition with instruments (or voice) and fixed media</text:p>
        </text:list-item>
        <text:list-item>
          <text:p text:style-name="P26">Composition with live electronics, with or without instruments</text:p>
        </text:list-item>
        <text:list-item>
          <text:p text:style-name="P26">Interactive mixed-media performance and live coding</text:p>
        </text:list-item>
        <text:list-item>
          <text:p text:style-name="P26">Audiovisual composition</text:p>
        </text:list-item>
        <text:list-item>
          <text:p text:style-name="P26">Multimedia installation</text:p>
        </text:list-item>
      </text:list>
      <text:p text:style-name="P27"/>
      <text:p text:style-name="P28">Titl<text:span text:style-name="T1">e</text:span></text:p>
      <text:p text:style-name="P29">Full title of the work as it should appear in programs and promotional materials.</text:p>
      <text:p text:style-name="P29"/>
      <text:p text:style-name="P28"><text:span text:style-name="T19">Sottot</text:span>itolo</text:p>
      <text:p text:style-name="P29">Full subtitle (if applicable) as it should appear in programs and promotional materials.</text:p>
      <text:p text:style-name="P30"/>
      <text:p text:style-name="P31">Year</text:p>
      <text:p text:style-name="P32">the year in which the work was composed.</text:p>
      <text:p text:style-name="P33"/>
      <text:p text:style-name="P34"><text:span text:style-name="T3">Authors<text:line-break/></text:span>First and last name of all authors, separated by commas.</text:p>
      <text:p text:style-name="P30"/>
      <text:p text:style-name="P30">Durat<text:span text:style-name="T1">ion</text:span></text:p>
      <text:p text:style-name="P23">Expected performance duration in HH:MM:SS format. If the duration is variable, specify the minimum and maximum acceptable duration.</text:p>
      <text:p text:style-name="P23"/>
      <text:p text:style-name="P35"><text:span text:style-name="T20">P</text:span><text:span text:style-name="T3">erformers</text:span></text:p>
      <text:p text:style-name="P23">First and last name of all performers identified by the authors, separated by commas.</text:p>
      <text:p text:style-name="P23"/>
      <text:p text:style-name="P36">Repository URL</text:p>
      <text:p text:style-name="P27">The URL(s) of the repository for materials that cannot be uploaded via EasyChair, required for the evaluation of the work and its performance (scores, multimedia content, etc.).</text:p>
      <text:p text:style-name="P23"/>
      <text:p text:style-name="P37">Work Presentation</text:p>
      <text:p text:style-name="P38">Summary of the work or performance, outlining its concept, structure, instruments, and any interpretative elements useful to the reviewers. The information will be used solely for the evaluation of the work and will not be published if selected. Maximum length: 2000 characters, including spaces.</text:p>
      <text:p text:style-name="P38"/>
      <text:p text:style-name="P39">Program Notes</text:p>
      <text:p text:style-name="P40">Brief description of the work as it should appear in programs and promotional materials. Maximum length: <text:span text:style-name="T21">10</text:span>00 characters, spaces included.</text:p>
      <text:p text:style-name="P23"/>
      <text:p text:style-name="P41">Authors’ Biographies</text:p>
      <text:p text:style-name="P42">First name, last name, place and year of birth, and biographical notes for each author of the work, in the form in which they should appear in programs and promotional materials. Maximum length: <text:span text:style-name="T21">5</text:span>00 characters, spaces included.</text:p>
      <text:p text:style-name="P42"/>
      <text:p text:style-name="P43">Performers’ Biographies </text:p>
      <text:p text:style-name="P44">First name, last name, role, and biographical notes related to the identified performers, in the form in which they should appear in programs and promotional materials. Maximum length: 500 characters, spaces included.</text:p>
      <text:p text:style-name="P23"/>
      <text:p text:style-name="P43">Technical Rider</text:p>
      <text:p text:style-name="P44">Essential technical information for the performance or installation of the work, such as required instruments or equipment, audio/video formats, and other logistical requirements. Maximum length: 1000 characters, spaces inclu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in" fo:margin-bottom="0in" style:contextual-spacing="false" fo:text-align="start" style:justify-single-word="false" fo:orphans="0" fo:widows="0" style:writing-mode="lr-tb"/>
    </style:style>
    <style:style style:name="program_20_notes" style:display-name="program notes" style:family="paragraph" style:parent-style-name="normal">
      <loext:graphic-properties draw:fill="none" draw:fill-color="#ffffff"/>
      <style:paragraph-properties fo:margin-left="0in" fo:margin-right="0.0811in" fo:margin-top="0in" fo:margin-bottom="0in" style:contextual-spacing="false" fo:line-height="100%" fo:text-align="justify" style:justify-single-word="false" fo:keep-together="auto" fo:orphans="0" fo:widows="0" fo:text-indent="0in" style:auto-text-indent="false" fo:background-color="transparent" fo:padding="0in" fo:border="none" style:shadow="none" fo:keep-with-next="auto"/>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oNumPag" style:family="paragraph" style:parent-style-name="Footer">
      <style:paragraph-properties fo:text-align="center" style:justify-single-word="false"/>
      <style:text-properties style:font-name="Times New Roman" fo:font-family="'Times New Roman'" style:font-family-generic="roman" style:font-pitch="variabl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text-properties style:font-name="Times New Roman"/>
    </style:style>
    <style:page-layout style:name="Mpm1">
      <style:page-layout-properties fo:page-width="8.2681in" fo:page-height="11.6929in" style:num-format="1" style:print-orientation="portrait" fo:margin-top="0.7874in" fo:margin-bottom="0.3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929in" fo:margin-left="0in" fo:margin-right="0in" fo:margin-top="0.1965in" fo:background-color="transparent" draw:fill="none" draw:fill-color="#729fcf"/>
      </style:footer-style>
    </style:page-layout>
    <style:page-layout style:name="Mpm2" style:page-usage="right">
      <style:page-layout-properties fo:page-width="8.2681in" fo:page-height="11.6929in" style:num-format="1" style:print-orientation="portrait" fo:margin-top="0.7874in" fo:margin-bottom="0.667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ile di pagina predefinito2"/><text:bookmark-start text:name="PageNumWizard_FOOTER_Stile di pagina predefinito3"/><text:page-number text:select-page="current">3</text:page-number><text:bookmark-end text:name="PageNumWizard_FOOTER_Stile di pagina predefinito2"/><text:bookmark-end text:name="PageNumWizard_FOOTER_Stile di pagina predefinito3"/></text:p>
      </style:footer>
    </style:master-page>
    <style:master-page style:name="Right_20_Page" style:display-name="Right Page" style:page-layout-name="Mpm2" draw:style-name="Mdp1" style:next-style-name="Left_20_Page"/>
    <style:master-page style:name="Left_20_Page" style:display-name="Left Page" style:page-layout-name="Mpm3"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0T22:53:04.513003600</meta:creation-date>
    <dc:date>2026-05-29T22:07:04.764616000</dc:date>
    <meta:editing-duration>PT1H19M37S</meta:editing-duration>
    <meta:editing-cycles>17</meta:editing-cycles>
    <meta:generator>LibreOffice/25.8.2.2$MacOSX_AARCH64 LibreOffice_project/d401f2107ccab8f924a8e2df40f573aab7605b6f</meta:generator>
    <dc:title>XXV CIM Colloquio di Informatica Musicale - Application form for works</dc:title>
    <meta:document-statistic meta:table-count="6" meta:image-count="0" meta:object-count="0" meta:page-count="5" meta:paragraph-count="74" meta:word-count="1024" meta:character-count="6740" meta:non-whitespace-character-count="5790"/>
  </office:meta>
</office:document-meta>
</file>